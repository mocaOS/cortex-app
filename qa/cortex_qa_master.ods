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dr" style:family="table-cell" style:display-name="hdr">
      <style:text-properties fo:font-weight="bold" fo:color="#ffffff"/>
      <style:table-cell-properties fo:background-color="#1f2933" fo:wrap-option="wrap" style:vertical-align="middle"/>
    </style:style>
    <style:style style:name="cell" style:family="table-cell" style:display-name="cell">
      <style:table-cell-properties fo:wrap-option="wrap" style:vertical-align="top"/>
    </style:style>
    <style:style style:name="wcol" style:family="table-column" style:display-name="wcol">
      <style:table-column-properties style:column-width="6cm"/>
    </style:style>
    <style:style style:name="mcol" style:family="table-column" style:display-name="mcol">
      <style:table-column-properties style:column-width="3cm"/>
    </style:style>
    <style:style style:name="ncol" style:family="table-column" style:display-name="ncol">
      <style:table-column-properties style:column-width="2cm"/>
    </style:style>
  </office:automatic-styles>
  <office:body>
    <office:spreadsheet>
      <table:table table:name="Features">
        <table:table-column table:style-name="mcol"/>
        <table:table-column table:style-name="mcol"/>
        <table:table-column table:style-name="ncol"/>
        <table:table-column table:style-name="wcol"/>
        <table:table-column table:style-name="wcol"/>
        <table:table-column table:style-name="wcol"/>
        <table:table-column table:style-name="wcol"/>
        <table:table-column table:style-name="mcol"/>
        <table:table-column table:style-name="mcol"/>
        <table:table-column table:style-name="wcol"/>
        <table:table-column table:style-name="ncol"/>
        <table:table-column table:style-name="ncol"/>
        <table:table-column table:style-name="ncol"/>
        <table:table-column table:style-name="wcol"/>
        <table:table-column table:style-name="ncol"/>
        <table:table-row>
          <table:table-cell table:style-name="hdr" office:value-type="string">
            <text:p>Feature ID</text:p>
          </table:table-cell>
          <table:table-cell table:style-name="hdr" office:value-type="string">
            <text:p>Feature Name</text:p>
          </table:table-cell>
          <table:table-cell table:style-name="hdr" office:value-type="string">
            <text:p>Area</text:p>
          </table:table-cell>
          <table:table-cell table:style-name="hdr" office:value-type="string">
            <text:p>User Story</text:p>
          </table:table-cell>
          <table:table-cell table:style-name="hdr" office:value-type="string">
            <text:p>Expected Behaviour</text:p>
          </table:table-cell>
          <table:table-cell table:style-name="hdr" office:value-type="string">
            <text:p>Edge Cases</text:p>
          </table:table-cell>
          <table:table-cell table:style-name="hdr" office:value-type="string">
            <text:p>Validation Rules</text:p>
          </table:table-cell>
          <table:table-cell table:style-name="hdr" office:value-type="string">
            <text:p>Dependencies</text:p>
          </table:table-cell>
          <table:table-cell table:style-name="hdr" office:value-type="string">
            <text:p>Assumptions</text:p>
          </table:table-cell>
          <table:table-cell table:style-name="hdr" office:value-type="string">
            <text:p>Test Cases</text:p>
          </table:table-cell>
          <table:table-cell table:style-name="hdr" office:value-type="string">
            <text:p>Current Status</text:p>
          </table:table-cell>
          <table:table-cell table:style-name="hdr" office:value-type="string">
            <text:p>Defect Count</text:p>
          </table:table-cell>
          <table:table-cell table:style-name="hdr" office:value-type="string">
            <text:p>Severity</text:p>
          </table:table-cell>
          <table:table-cell table:style-name="hdr" office:value-type="string">
            <text:p>Notes</text:p>
          </table:table-cell>
          <table:table-cell table:style-name="hdr" office:value-type="string">
            <text:p>Last Tested Date</text:p>
          </table:table-cell>
        </table:table-row>
        <table:table-row>
          <table:table-cell table:style-name="cell" office:value-type="string">
            <text:p>F-AUTH-001</text:p>
          </table:table-cell>
          <table:table-cell table:style-name="cell" office:value-type="string">
            <text:p>Admin login (email/password)</text:p>
          </table:table-cell>
          <table:table-cell table:style-name="cell" office:value-type="string">
            <text:p>Auth</text:p>
          </table:table-cell>
          <table:table-cell table:style-name="cell" office:value-type="string">
            <text:p>As an admin, I want to sign in with email and password so that I can access the knowledge base.</text:p>
          </table:table-cell>
          <table:table-cell table:style-name="cell" office:value-type="string">
            <text:p>POST login server action validates ADMIN_EMAIL/ADMIN_PASSWORD; on success stores ADMIN_API_KEY in localStorage + sets session cookie and redirects to ? from or /. /login UI is a glass card with email+password.</text:p>
          </table:table-cell>
          <table:table-cell table:style-name="cell" office:value-type="string">
            <text:p>Empty fields -&gt; 'Email and password are required'; no ADMIN_PASSWORD env -&gt; 'Admin authentication not configured'; wrong creds -&gt; 'Invalid email or password'; already-authed visiting /login -&gt; redirect to /.</text:p>
          </table:table-cell>
          <table:table-cell table:style-name="cell" office:value-type="string">
            <text:p>Both fields required (HTML + server); email type; exact credential match.</text:p>
          </table:table-cell>
          <table:table-cell table:style-name="cell" office:value-type="string">
            <text:p>lib/auth.ts login server action; env ADMIN_EMAIL/ADMIN_PASSWORD/ADMIN_API_KEY.</text:p>
          </table:table-cell>
          <table:table-cell table:style-name="cell" office:value-type="string">
            <text:p>Single admin identity; no multi-user. Session cookie gates routing, API key gates API calls.</text:p>
          </table:table-cell>
          <table:table-cell table:style-name="cell" office:value-type="string">
            <text:p>Happy: valid creds -&gt; redirect+key stored. Error: wrong creds, empty fields, unconfigured env. Security: ? from open-redirect attempt; key never logged. Boundary: very long password. Responsive: card centered on mobile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Auth = single admin via env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UTH-002</text:p>
          </table:table-cell>
          <table:table-cell table:style-name="cell" office:value-type="string">
            <text:p>Route auth-gating &amp; logout</text:p>
          </table:table-cell>
          <table:table-cell table:style-name="cell" office:value-type="string">
            <text:p>Auth</text:p>
          </table:table-cell>
          <table:table-cell table:style-name="cell" office:value-type="string">
            <text:p>As an admin, I want protected routes to require login and a logout that clears my session so that the KB is not publicly accessible.</text:p>
          </table:table-cell>
          <table:table-cell table:style-name="cell" office:value-type="string">
            <text:p>proxy.ts middleware redirects unauthenticated users on /,/add,/ask,/explore,/documents,/collections,/turbo,/admin to /login? from=path. Logout calls clearAdminApiKey()+logout() server action -&gt; /login.</text:p>
          </table:table-cell>
          <table:table-cell table:style-name="cell" office:value-type="string">
            <text:p>Missing localStorage key -&gt; api.request throws 'Not authenticated'; session expiry mid-poll; deep-link to protected route preserves ? from.</text:p>
          </table:table-cell>
          <table:table-cell table:style-name="cell" office:value-type="string">
            <text:p>Cookie presence checked in middleware.</text:p>
          </table:table-cell>
          <table:table-cell table:style-name="cell" office:value-type="string">
            <text:p>proxy.ts, AuthProvider, lib/api.ts.</text:p>
          </table:table-cell>
          <table:table-cell table:style-name="cell" office:value-type="string">
            <text:p>Cookie and localStorage stay in sync.</text:p>
          </table:table-cell>
          <table:table-cell table:style-name="cell" office:value-type="string">
            <text:p>Happy: logout clears + redirects. Error: expired session during 5s poll -&gt; graceful. Security: direct API call without X-API-Key -&gt; 401; tampered cookie. Permission: access /admin unauthenticated -&gt; /login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EC-001</text:p>
          </table:table-cell>
          <table:table-cell table:style-name="cell" office:value-type="string">
            <text:p>API key permission tiers</text:p>
          </table:table-cell>
          <table:table-cell table:style-name="cell" office:value-type="string">
            <text:p>Security</text:p>
          </table:table-cell>
          <table:table-cell table:style-name="cell" office:value-type="string">
            <text:p>As an operator, I want READ/MANAGE/admin permission tiers enforced per endpoint so that scoped keys cannot exceed their grants.</text:p>
          </table:table-cell>
          <table:table-cell table:style-name="cell" office:value-type="string">
            <text:p>require_read/manage/admin dependencies: 401 if no/invalid key; 403 with specific 'X access required' messages. Admin = env ADMIN_API_KEY only (implicit READ+MANAGE+all collections); generated keys never admin.</text:p>
          </table:table-cell>
          <table:table-cell table:style-name="cell" office:value-type="string">
            <text:p>Missing key (auto_error=False) -&gt; 401; key lacking permission -&gt; 403; key_id='admin' protected from disable/delete (403).</text:p>
          </table:table-cell>
          <table:table-cell table:style-name="cell" office:value-type="string">
            <text:p>Permissions list (read/manage), collection_scope (all/restricted+allowed_collections).</text:p>
          </table:table-cell>
          <table:table-cell table:style-name="cell" office:value-type="string">
            <text:p>auth_service.py, api_key_service.py, Neo4j key store.</text:p>
          </table:table-cell>
          <table:table-cell table:style-name="cell" office:value-type="string">
            <text:p>Only one admin key. Generated keys hashed at rest.</text:p>
          </table:table-cell>
          <table:table-cell table:style-name="cell" office:value-type="string">
            <text:p>Permission matrix: read key on manage endpoint -&gt; 403; no key -&gt; 401; admin on all. Security: forged key, revoked key reuse, modify 'admin' key -&gt; 403. Boundary: key with empty permissions.</text:p>
          </table:table-cell>
          <table:table-cell table:style-name="cell" office:value-type="string">
            <text:p>Tested (test_auth_service unit + test_auth_enforcement_http + LIVE E2E: real 401 on protected endpoints against running deployment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auth_service core + HTTP enforcement + live deployment auth-boundary all confirmed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EC-002</text:p>
          </table:table-cell>
          <table:table-cell table:style-name="cell" office:value-type="string">
            <text:p>Collection access scoping</text:p>
          </table:table-cell>
          <table:table-cell table:style-name="cell" office:value-type="string">
            <text:p>Security</text:p>
          </table:table-cell>
          <table:table-cell table:style-name="cell" office:value-type="string">
            <text:p>As an operator issuing restricted keys, I want collection-scoped access so that a key only reads/writes its allowed collections.</text:p>
          </table:table-cell>
          <table:table-cell table:style-name="cell" office:value-type="string">
            <text:p>validate_collection_access returns 403 'API key does not have permission to {action} collection {id}'. Restricted keys silently filter list results; explicit collection_id mismatch -&gt; 403; collection_id=None means all-accessible.</text:p>
          </table:table-cell>
          <table:table-cell table:style-name="cell" office:value-type="string">
            <text:p>delete/move endpoints do NOT re-validate per-doc source collection (rely on list filtering); restricted key requesting merge-history -&gt; 403.</text:p>
          </table:table-cell>
          <table:table-cell table:style-name="cell" office:value-type="string">
            <text:p>allowed_collections membership; nonexistent collection in key creation -&gt; 400.</text:p>
          </table:table-cell>
          <table:table-cell table:style-name="cell" office:value-type="string">
            <text:p>auth_service.py.</text:p>
          </table:table-cell>
          <table:table-cell table:style-name="cell" office:value-type="string">
            <text:p>List filtering is sufficient guard for bulk doc ops.</text:p>
          </table:table-cell>
          <table:table-cell table:style-name="cell" office:value-type="string">
            <text:p>Happy: scoped key lists only its collection. Permission: scoped key hits other collection -&gt; 403. Edge: bulk move/delete cross-collection (potential gap). Security: scope escalation via allowed_collections edit.</text:p>
          </table:table-cell>
          <table:table-cell table:style-name="cell" office:value-type="string">
            <text:p>Tested (test_auth_service: can_access_collection, get_collection_filter, validate_collection_access 403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Bulk delete/move per-doc check gap noted by API map. Collection-scope logic now unit-tested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EC-003</text:p>
          </table:table-cell>
          <table:table-cell table:style-name="cell" office:value-type="string">
            <text:p>Prompt-injection guard</text:p>
          </table:table-cell>
          <table:table-cell table:style-name="cell" office:value-type="string">
            <text:p>Security</text:p>
          </table:table-cell>
          <table:table-cell table:style-name="cell" office:value-type="string">
            <text:p>As an operator, I want prompt-injection attempts in questions detected so that the assistant refuses system-prompt extraction / instruction bypass.</text:p>
          </table:table-cell>
          <table:table-cell table:style-name="cell" office:value-type="string">
            <text:p>prompt_security.py regex detection of system-prompt extraction, instruction bypass, encoding obfuscation. /api/ask/stream returns a safe refusal (not an error) on detection.</text:p>
          </table:table-cell>
          <table:table-cell table:style-name="cell" office:value-type="string">
            <text:p>Obfuscated/encoded payloads; multilingual injections; legitimate questions containing trigger words (false positives).</text:p>
          </table:table-cell>
          <table:table-cell table:style-name="cell" office:value-type="string">
            <text:p>Regex pattern set.</text:p>
          </table:table-cell>
          <table:table-cell table:style-name="cell" office:value-type="string">
            <text:p>prompt_security.py, research_prompts anti-injection text.</text:p>
          </table:table-cell>
          <table:table-cell table:style-name="cell" office:value-type="string">
            <text:p>Regex-based detection is best-effort, not exhaustive.</text:p>
          </table:table-cell>
          <table:table-cell table:style-name="cell" office:value-type="string">
            <text:p>Happy: normal question passes. Security: 'ignore previous instructions', base64 payload, 'print your system prompt' -&gt; safe refusal. Boundary: benign text with 'ignore' word -&gt; false-positive check.</text:p>
          </table:table-cell>
          <table:table-cell table:style-name="cell" office:value-type="string">
            <text:p>Tested (test_researcher_prompt anti-injection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EC-004</text:p>
          </table:table-cell>
          <table:table-cell table:style-name="cell" office:value-type="string">
            <text:p>Rate limiting &amp; monthly query quota</text:p>
          </table:table-cell>
          <table:table-cell table:style-name="cell" office:value-type="string">
            <text:p>Security</text:p>
          </table:table-cell>
          <table:table-cell table:style-name="cell" office:value-type="string">
            <text:p>As an operator, I want per-key rate limits and a monthly query cap so that abuse and runaway costs are bounded.</text:p>
          </table:table-cell>
          <table:table-cell table:style-name="cell" office:value-type="string">
            <text:p>enforce_rate_limit (token bucket keyed by API key/IP) on upload/search/ask*: 429 + Retry-After when RATE_LIMIT_QPM&gt;0 exceeded. enforce_query_quota: 429 + Retry-After to next UTC month when MAX_QUERIES_PER_MONTH&gt;0 exceeded; no-op at 0.</text:p>
          </table:table-cell>
          <table:table-cell table:style-name="cell" office:value-type="string">
            <text:p>Quota=0 disables; bucket falls back to client IP when no key; quota pre-warms reranker as side effect; chat endpoints gated, non-chat (search) behavior per test matrix.</text:p>
          </table:table-cell>
          <table:table-cell table:style-name="cell" office:value-type="string">
            <text:p>RATE_LIMIT_QPM, MAX_QUERIES_PER_MONTH ints.</text:p>
          </table:table-cell>
          <table:table-cell table:style-name="cell" office:value-type="string">
            <text:p>rate_limiter.py, neo4j query count.</text:p>
          </table:table-cell>
          <table:table-cell table:style-name="cell" office:value-type="string">
            <text:p>In-process token bucket (per instance, not cluster-wide).</text:p>
          </table:table-cell>
          <table:table-cell table:style-name="cell" office:value-type="string">
            <text:p>Happy: under limit OK. Boundary: exactly at limit, limit+1 -&gt; 429+Retry-After. Disabled: 0 -&gt; unlimited. Perf: burst of N requests. Security: spoof X-API-Key to evade bucket.</text:p>
          </table:table-cell>
          <table:table-cell table:style-name="cell" office:value-type="string">
            <text:p>Tested (test_resilience, test_max_queries_per_month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1</text:p>
          </table:table-cell>
          <table:table-cell table:style-name="cell" office:value-type="string">
            <text:p>File upload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upload documents (drag-drop/multi-file) into a collection so that they can be ingested into the KB.</text:p>
          </table:table-cell>
          <table:table-cell table:style-name="cell" office:value-type="string">
            <text:p>POST /api/upload (manage+rate-limit) multipart file; collection_id default 'default', start_processing default false (queued pending), source. Returns UploadResponse{document_id,filename,status,source}. UploadModal filters by extension allowlist, concurrency 10.</text:p>
          </table:table-cell>
          <table:table-cell table:style-name="cell" office:value-type="string">
            <text:p>Extension not allowed -&gt; 400; duplicate filename+size -&gt; 409; size&gt;MAX_FILE_SIZE_MB -&gt; 400 (checked AFTER full read into memory); MAX_FILES/MAX_ENTITIES reached -&gt; 403; store failure cleans file + 500; disallowed files silently dropped in UI.</text:p>
          </table:table-cell>
          <table:table-cell table:style-name="cell" office:value-type="string">
            <text:p>allowed_extensions; MAX_FILE_SIZE_MB; collection access (403); MAX_FILES/MAX_ENTITIES caps.</text:p>
          </table:table-cell>
          <table:table-cell table:style-name="cell" office:value-type="string">
            <text:p>document_processor, neo4j, collections.</text:p>
          </table:table-cell>
          <table:table-cell table:style-name="cell" office:value-type="string">
            <text:p>Whole file buffered in memory before size check.</text:p>
          </table:table-cell>
          <table:table-cell table:style-name="cell" office:value-type="string">
            <text:p>Happy: valid pdf -&gt; 201/pending. Error: bad ext -&gt; 400, dup -&gt; 409, oversize -&gt; 400, cap reached -&gt; 403. Boundary: 0-byte file, file exactly at size limit. Invalid: no file part -&gt; 422. Perf: very large file memory pressure. Permission: read-only key -&gt; 403. Responsive: drag-drop on mobile.</text:p>
          </table:table-cell>
          <table:table-cell table:style-name="cell" office:value-type="string">
            <text:p>Tested (caps + LIVE E2E ingestion: upload-&gt;processed(completed)-&gt;searchable-&gt;self-cleaning delete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Full upload journey executed end-to-end against the running deployment (real embeddings). Post-read size check is a memory-pressure risk (no 413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2</text:p>
          </table:table-cell>
          <table:table-cell table:style-name="cell" office:value-type="string">
            <text:p>Document list, filter, search, pagination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browse/filter/search/paginate documents so that I can find and manage them.</text:p>
          </table:table-cell>
          <table:table-cell table:style-name="cell" office:value-type="string">
            <text:p>GET /api/documents; UI polls every 5s; filters by collection/status/source; client search by filename or topic; 100/page with URL ?page= and ellipsis. Status badges + dual progress bars (processing + image-analysis); chunk count; error messages.</text:p>
          </table:table-cell>
          <table:table-cell table:style-name="cell" office:value-type="string">
            <text:p>Out-of-bounds page auto-corrects; selections cleared on filter change; uploaded docs briefly hidden to avoid flicker; source filter hidden when single source; empty vs filtered-empty states.</text:p>
          </table:table-cell>
          <table:table-cell table:style-name="cell" office:value-type="string">
            <text:p>page&gt;=1 clamped.</text:p>
          </table:table-cell>
          <table:table-cell table:style-name="cell" office:value-type="string">
            <text:p>getDocuments, getCollections.</text:p>
          </table:table-cell>
          <table:table-cell table:style-name="cell" office:value-type="string">
            <text:p>Client-side search/filter on polled list.</text:p>
          </table:table-cell>
          <table:table-cell table:style-name="cell" office:value-type="string">
            <text:p>Happy: list+paginate. Boundary: page beyond max, 0 docs, exactly 100. Error: API failure -&gt; error state. Perf: 5000 docs list/poll. Responsive: cards stack on mobile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3</text:p>
          </table:table-cell>
          <table:table-cell table:style-name="cell" office:value-type="string">
            <text:p>Document view / content / file download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view a document's content and download the original file so that I can verify ingested material.</text:p>
          </table:table-cell>
          <table:table-cell table:style-name="cell" office:value-type="string">
            <text:p>GET /api/documents/{id}, /content (doc+chunks+full_content), /file (FileResponse). UI: markdown opens in-modal (blob), others open blob URL in new tab.</text:p>
          </table:table-cell>
          <table:table-cell table:style-name="cell" office:value-type="string">
            <text:p>404 if doc or on-disk file missing; 403 collection; large content modal.</text:p>
          </table:table-cell>
          <table:table-cell table:style-name="cell" office:value-type="string">
            <text:p>doc existence; collection access.</text:p>
          </table:table-cell>
          <table:table-cell table:style-name="cell" office:value-type="string">
            <text:p>neo4j, filesystem.</text:p>
          </table:table-cell>
          <table:table-cell table:style-name="cell" office:value-type="string">
            <text:p>Original file retained on disk.</text:p>
          </table:table-cell>
          <table:table-cell table:style-name="cell" office:value-type="string">
            <text:p>Happy: view md + download pdf. Error: missing doc -&gt; 404, missing file-on-disk -&gt; 404. Permission: scoped key other collection -&gt; 403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4</text:p>
          </table:table-cell>
          <table:table-cell table:style-name="cell" office:value-type="string">
            <text:p>Document delete (single/bulk/all)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delete documents individually, in bulk, or all, so that I can clean up the KB.</text:p>
          </table:table-cell>
          <table:table-cell table:style-name="cell" office:value-type="string">
            <text:p>DELETE /api/documents/{id}; POST /api/documents/delete (bulk); DELETE /api/documents (ALL, destructive). Cancels active processing, deletes doc+orphaned entities/communities, returns counts.</text:p>
          </table:table-cell>
          <table:table-cell table:style-name="cell" office:value-type="string">
            <text:p>404 missing; 403 collection (single); bulk has no per-doc collection re-check; deleting while processing cancels task.</text:p>
          </table:table-cell>
          <table:table-cell table:style-name="cell" office:value-type="string">
            <text:p>document_ids list.</text:p>
          </table:table-cell>
          <table:table-cell table:style-name="cell" office:value-type="string">
            <text:p>neo4j, task store.</text:p>
          </table:table-cell>
          <table:table-cell table:style-name="cell" office:value-type="string">
            <text:p>Orphan cleanup runs on delete.</text:p>
          </table:table-cell>
          <table:table-cell table:style-name="cell" office:value-type="string">
            <text:p>Happy: delete single/bulk/all -&gt; counts. Error: missing id -&gt; 404. Boundary: empty id list, delete-all on empty KB. Permission: read key -&gt; 403. Security: bulk delete cross-collection (gap)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DELETE /api/documents is irreversible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5</text:p>
          </table:table-cell>
          <table:table-cell table:style-name="cell" office:value-type="string">
            <text:p>Reprocess documents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reprocess existing or failed documents (optionally with a new file) so that I can re-extract after fixes.</text:p>
          </table:table-cell>
          <table:table-cell table:style-name="cell" office:value-type="string">
            <text:p>POST /api/documents/{id}/reprocess (optional file); POST /api/documents/reprocess (batch, concurrency 1-50, chain=relationship_analysis,community_detection). Without file uses stored file; missing stored file -&gt; 400.</text:p>
          </table:table-cell>
          <table:table-cell table:style-name="cell" office:value-type="string">
            <text:p>404 doc; 403 collection; bad ext/oversize file -&gt; 400; per-doc not-found/denied recorded (non-fatal) in batch; reprocess delta-skip if unchanged fingerprint.</text:p>
          </table:table-cell>
          <table:table-cell table:style-name="cell" office:value-type="string">
            <text:p>concurrency ge1 le50; chain csv whitelist.</text:p>
          </table:table-cell>
          <table:table-cell table:style-name="cell" office:value-type="string">
            <text:p>document_processor, task store, checkpoint delta.</text:p>
          </table:table-cell>
          <table:table-cell table:style-name="cell" office:value-type="string">
            <text:p>Stored file required when no upload provided.</text:p>
          </table:table-cell>
          <table:table-cell table:style-name="cell" office:value-type="string">
            <text:p>Happy: reprocess completed doc. Error: no stored file -&gt; 400, bad ext -&gt; 400. Boundary: concurrency 1 and 50, 51 -&gt; 422. Chain: relationship+community chained.</text:p>
          </table:table-cell>
          <table:table-cell table:style-name="cell" office:value-type="string">
            <text:p>Tested (test_checkpoint_delta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6</text:p>
          </table:table-cell>
          <table:table-cell table:style-name="cell" office:value-type="string">
            <text:p>Pending processing &amp; move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process all pending docs and move docs between collections so that I can control ingestion and organization.</text:p>
          </table:table-cell>
          <table:table-cell table:style-name="cell" office:value-type="string">
            <text:p>GET /api/documents/pending; POST /api/documents/process-pending (concurrency, chain) -&gt; task_id; POST /api/documents/move (target collection access 403). No pending -&gt; message, no task.</text:p>
          </table:table-cell>
          <table:table-cell table:style-name="cell" office:value-type="string">
            <text:p>Background image-analysis wait holds task running; move to inaccessible collection -&gt; 403.</text:p>
          </table:table-cell>
          <table:table-cell table:style-name="cell" office:value-type="string">
            <text:p>concurrency ge1 le50; target_collection_id access.</text:p>
          </table:table-cell>
          <table:table-cell table:style-name="cell" office:value-type="string">
            <text:p>task store, document_processor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process pending -&gt; task. Boundary: no pending -&gt; no task. Permission: move to forbidden collection -&gt; 403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-007</text:p>
          </table:table-cell>
          <table:table-cell table:style-name="cell" office:value-type="string">
            <text:p>Bulk download ZIP</text:p>
          </table:table-cell>
          <table:table-cell table:style-name="cell" office:value-type="string">
            <text:p>Documents</text:p>
          </table:table-cell>
          <table:table-cell table:style-name="cell" office:value-type="string">
            <text:p>As a user, I want to download selected documents as a ZIP so that I can export originals.</text:p>
          </table:table-cell>
          <table:table-cell table:style-name="cell" office:value-type="string">
            <text:p>POST /api/documents/download-zip {document_ids}; streams ZIP64 in 1MB chunks; duplicate filenames de-duped.</text:p>
          </table:table-cell>
          <table:table-cell table:style-name="cell" office:value-type="string">
            <text:p>Empty list -&gt; 400; no docs found -&gt; 404; restricted key with no accessible docs -&gt; 403; large collection streamed.</text:p>
          </table:table-cell>
          <table:table-cell table:style-name="cell" office:value-type="string">
            <text:p>non-empty document_ids.</text:p>
          </table:table-cell>
          <table:table-cell table:style-name="cell" office:value-type="string">
            <text:p>filesystem.</text:p>
          </table:table-cell>
          <table:table-cell table:style-name="cell" office:value-type="string">
            <text:p>Files present on disk.</text:p>
          </table:table-cell>
          <table:table-cell table:style-name="cell" office:value-type="string">
            <text:p>Happy: zip 3 docs. Error: empty list -&gt; 400, none found -&gt; 404. Permission: scoped key -&gt; 403. Perf: 1000-doc zip streaming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IN-001</text:p>
          </table:table-cell>
          <table:table-cell table:style-name="cell" office:value-type="string">
            <text:p>Add knowledge (custom Q&amp;A/Text/Markdown)</text:p>
          </table:table-cell>
          <table:table-cell table:style-name="cell" office:value-type="string">
            <text:p>Custom Inputs</text:p>
          </table:table-cell>
          <table:table-cell table:style-name="cell" office:value-type="string">
            <text:p>As a user, I want to manually add Q&amp;A/Text/Markdown entries and edit existing ones so that I can enrich the KB without files.</text:p>
          </table:table-cell>
          <table:table-cell table:style-name="cell" office:value-type="string">
            <text:p>POST /api/custom-input (input_type qa/text/markdown, content min 10, answer? for qa, title? max200, collection_id?, start_processing default true). Generates filename via LLM, writes .md, processes. Editing deletes old doc then recreates.</text:p>
          </table:table-cell>
          <table:table-cell table:style-name="cell" office:value-type="string">
            <text:p>QA without answer -&gt; 400; content&lt;10 -&gt; 422; MAX_FILES/MAX_ENTITIES -&gt; 403; LLM filename fallback.</text:p>
          </table:table-cell>
          <table:table-cell table:style-name="cell" office:value-type="string">
            <text:p>content min_length 10; qa requires answer; title&lt;=200.</text:p>
          </table:table-cell>
          <table:table-cell table:style-name="cell" office:value-type="string">
            <text:p>LLM, neo4j, document_processor.</text:p>
          </table:table-cell>
          <table:table-cell table:style-name="cell" office:value-type="string">
            <text:p>Edit = delete+recreate (not in-place).</text:p>
          </table:table-cell>
          <table:table-cell table:style-name="cell" office:value-type="string">
            <text:p>Happy: add text entry. Error: qa no answer -&gt; 400, content&lt;10 -&gt; 422, cap -&gt; 403. Boundary: content exactly 10 chars, title 200/201. Edit: update existing.</text:p>
          </table:table-cell>
          <table:table-cell table:style-name="cell" office:value-type="string">
            <text:p>Tested (caps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IN-002</text:p>
          </table:table-cell>
          <table:table-cell table:style-name="cell" office:value-type="string">
            <text:p>AI topic hint generation</text:p>
          </table:table-cell>
          <table:table-cell table:style-name="cell" office:value-type="string">
            <text:p>Custom Inputs</text:p>
          </table:table-cell>
          <table:table-cell table:style-name="cell" office:value-type="string">
            <text:p>As a user, I want an AI-suggested topic and similar-existing-topic chips so that my entries are well-titled and de-duplicated.</text:p>
          </table:table-cell>
          <table:table-cell table:style-name="cell" office:value-type="string">
            <text:p>POST /api/custom-input/generate-topic {content min10, answer?, input_type}. Returns {topic_hint, existing_similar[]}. Falls back to keyword extraction without OpenAI key / on LLM error.</text:p>
          </table:table-cell>
          <table:table-cell table:style-name="cell" office:value-type="string">
            <text:p>content&lt;10 -&gt; 422; no LLM -&gt; keyword fallback (no 500); similar chips clickable.</text:p>
          </table:table-cell>
          <table:table-cell table:style-name="cell" office:value-type="string">
            <text:p>content min_length 10.</text:p>
          </table:table-cell>
          <table:table-cell table:style-name="cell" office:value-type="string">
            <text:p>LLM (fast mode), neo4j search.</text:p>
          </table:table-cell>
          <table:table-cell table:style-name="cell" office:value-type="string">
            <text:p>Graceful degradation without LLM.</text:p>
          </table:table-cell>
          <table:table-cell table:style-name="cell" office:value-type="string">
            <text:p>Happy: generate hint + chips. Error: content&lt;10 -&gt; 422. Degradation: no OpenAI key -&gt; keyword fallback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IN-003</text:p>
          </table:table-cell>
          <table:table-cell table:style-name="cell" office:value-type="string">
            <text:p>Custom input list &amp; detail</text:p>
          </table:table-cell>
          <table:table-cell table:style-name="cell" office:value-type="string">
            <text:p>Custom Inputs</text:p>
          </table:table-cell>
          <table:table-cell table:style-name="cell" office:value-type="string">
            <text:p>As a user, I want to search and view my custom entries so that I can manage them.</text:p>
          </table:table-cell>
          <table:table-cell table:style-name="cell" office:value-type="string">
            <text:p>GET /api/custom-inputs (search?, limit 1-200, collection-filtered); GET /api/custom-inputs/{id} (404/403). UI list with 300ms debounce search.</text:p>
          </table:table-cell>
          <table:table-cell table:style-name="cell" office:value-type="string">
            <text:p>404 missing; 403 collection; empty list state.</text:p>
          </table:table-cell>
          <table:table-cell table:style-name="cell" office:value-type="string">
            <text:p>limit ge1 le200.</text:p>
          </table:table-cell>
          <table:table-cell table:style-name="cell" office:value-type="string">
            <text:p>neo4j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list+search. Boundary: limit 1/200/201. Error: missing id -&gt; 404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OL-001</text:p>
          </table:table-cell>
          <table:table-cell table:style-name="cell" office:value-type="string">
            <text:p>Collections CRUD</text:p>
          </table:table-cell>
          <table:table-cell table:style-name="cell" office:value-type="string">
            <text:p>Collections</text:p>
          </table:table-cell>
          <table:table-cell table:style-name="cell" office:value-type="string">
            <text:p>As a user, I want to create/rename/delete collections so that I can organize documents into scoped sub-graphs.</text:p>
          </table:table-cell>
          <table:table-cell table:style-name="cell" office:value-type="string">
            <text:p>GET/POST/PUT/DELETE /api/collections. Create (name 1-100, desc&lt;=500) capped by MAX_COLLECTIONS -&gt; 403. Default collection cannot be renamed/deleted (400). Delete moves docs to default, returns documents_moved.</text:p>
          </table:table-cell>
          <table:table-cell table:style-name="cell" office:value-type="string">
            <text:p>Rename 'default' -&gt; 400; delete 'default' -&gt; 400; 404 not found; 403 access; MAX_COLLECTIONS cap.</text:p>
          </table:table-cell>
          <table:table-cell table:style-name="cell" office:value-type="string">
            <text:p>name 1-100, description&lt;=500, access checks.</text:p>
          </table:table-cell>
          <table:table-cell table:style-name="cell" office:value-type="string">
            <text:p>neo4j.</text:p>
          </table:table-cell>
          <table:table-cell table:style-name="cell" office:value-type="string">
            <text:p>'default' collection always exists.</text:p>
          </table:table-cell>
          <table:table-cell table:style-name="cell" office:value-type="string">
            <text:p>Happy: create/rename/delete. Error: rename/delete default -&gt; 400, missing -&gt; 404, cap -&gt; 403. Boundary: name 1/100/101 chars, desc 500/501. Permission: read key -&gt; 403.</text:p>
          </table:table-cell>
          <table:table-cell table:style-name="cell" office:value-type="string">
            <text:p>Tested (test_max_collections + LIVE E2E CRUD round-trip vs real Neo4j: create/get/rename/delete/404, default-protected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Full collections journey executed end-to-end against the running deployment AND a self-provisioned ephemeral Neo4j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OL-002</text:p>
          </table:table-cell>
          <table:table-cell table:style-name="cell" office:value-type="string">
            <text:p>Collection entities &amp; doc membership</text:p>
          </table:table-cell>
          <table:table-cell table:style-name="cell" office:value-type="string">
            <text:p>Collections</text:p>
          </table:table-cell>
          <table:table-cell table:style-name="cell" office:value-type="string">
            <text:p>As a user, I want to view a collection's entities and add documents to it so that I can curate scoped sub-graphs.</text:p>
          </table:table-cell>
          <table:table-cell table:style-name="cell" office:value-type="string">
            <text:p>GET /api/collections/{id}/entities (limit 1-500); POST /api/collections/{id}/documents/{doc_id} (access 403, 404). UI expandable cards show top 10 entities (lazy).</text:p>
          </table:table-cell>
          <table:table-cell table:style-name="cell" office:value-type="string">
            <text:p>403 access; 404 collection/doc.</text:p>
          </table:table-cell>
          <table:table-cell table:style-name="cell" office:value-type="string">
            <text:p>limit ge1 le500.</text:p>
          </table:table-cell>
          <table:table-cell table:style-name="cell" office:value-type="string">
            <text:p>neo4j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list entities, add doc. Boundary: limit 1/500/501. Error: missing collection/doc -&gt; 404. Permission: scoped key -&gt; 403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KG-001</text:p>
          </table:table-cell>
          <table:table-cell table:style-name="cell" office:value-type="string">
            <text:p>Knowledge graph 3-step pipeline (/extract)</text:p>
          </table:table-cell>
          <table:table-cell table:style-name="cell" office:value-type="string">
            <text:p>Knowledge Graph</text:p>
          </table:table-cell>
          <table:table-cell table:style-name="cell" office:value-type="string">
            <text:p>As a user, I want a guided extract-&gt;relationships-&gt;communities pipeline with staleness cues so that I can build and keep the graph current.</text:p>
          </table:table-cell>
          <table:table-cell table:style-name="cell" office:value-type="string">
            <text:p>3 sequential gated step cards; Step1 entity extraction (process-pending), Step2 relationship analysis (cross-doc rels + ERR indicator), Step3 community detection. Generate/Regenerate clears communities+relationships+entities then reprocesses all with chain. ?autostart=1 auto-fires once.</text:p>
          </table:table-cell>
          <table:table-cell table:style-name="cell" office:value-type="string">
            <text:p>Resilient polling (5 retries+backoff, resume on visibilitychange); regeneration persisted in sessionStorage; chain observer ~30s no-task timeout aborts; staleness from new docs/re-analysis/merges; image-analysis-in-progress keeps Step1 running; buttons disabled at doc_count 0.</text:p>
          </table:table-cell>
          <table:table-cell table:style-name="cell" office:value-type="string">
            <text:p>Steps gated on previous; confirm dialogs on destructive regenerate/rebuild.</text:p>
          </table:table-cell>
          <table:table-cell table:style-name="cell" office:value-type="string">
            <text:p>getStats, getDocuments, listTasks, getTaskStatus, processPendingDocuments, reprocessDocuments, analyzeRelationships, detectCommunities, deleteAll*.</text:p>
          </table:table-cell>
          <table:table-cell table:style-name="cell" office:value-type="string">
            <text:p>Background chain survives navigation/close.</text:p>
          </table:table-cell>
          <table:table-cell table:style-name="cell" office:value-type="string">
            <text:p>Happy: full pipeline run. Edge: reload mid-run resumes; tab background+resume; autostart once. Error: transient poll error retries then aborts. Boundary: doc_count 0 disables. Destructive: rebuild/regenerate confirm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Complex stateful UI - high QA priority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KG-002</text:p>
          </table:table-cell>
          <table:table-cell table:style-name="cell" office:value-type="string">
            <text:p>Entity/relationship extraction engine</text:p>
          </table:table-cell>
          <table:table-cell table:style-name="cell" office:value-type="string">
            <text:p>Knowledge Graph</text:p>
          </table:table-cell>
          <table:table-cell table:style-name="cell" office:value-type="string">
            <text:p>As an operator, I want LLM-based entity/relationship extraction (per-chunk + batch phases) so that documents become a graph.</text:p>
          </table:table-cell>
          <table:table-cell table:style-name="cell" office:value-type="string">
            <text:p>graph_extractor.py: XML-parsed entities/relationships, type normalization, fuzzy match, clamping; chunk-batched extraction with degradation ladder; Phase A/B; dedicated relationship model support; batched KG writes (resolve-&gt;cluster-&gt;UNWIND).</text:p>
          </table:table-cell>
          <table:table-cell table:style-name="cell" office:value-type="string">
            <text:p>Malformed XML degradation; oversized batches; type normalization collisions; extraction disabled (ENABLE_GRAPH_EXTRACTION off) -&gt; 400 on analyze endpoint; no OpenAI key -&gt; extraction disabled (logged warning).</text:p>
          </table:table-cell>
          <table:table-cell table:style-name="cell" office:value-type="string">
            <text:p>XML schema parsing; clamps on counts.</text:p>
          </table:table-cell>
          <table:table-cell table:style-name="cell" office:value-type="string">
            <text:p>LLM, neo4j, llm_config.</text:p>
          </table:table-cell>
          <table:table-cell table:style-name="cell" office:value-type="string">
            <text:p>LLM returns parseable grouped XML; fallback ladder on failure.</text:p>
          </table:table-cell>
          <table:table-cell table:style-name="cell" office:value-type="string">
            <text:p>Happy: chunk -&gt; entities+rels. Error: malformed XML -&gt; degraded parse. Boundary: empty chunk, huge chunk batch. Parity: batched vs sequential write equivalence.</text:p>
          </table:table-cell>
          <table:table-cell table:style-name="cell" office:value-type="string">
            <text:p>Tested (test_xml_parsing, test_chunk_batch_extraction, test_batched_writes + LIVE E2E: entities extracted from uploaded doc, orphan cleanup verified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Unit-tested parsers + real extraction executed end-to-end against the live LLM (unique entities created then orphan-removed on doc delete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KG-003</text:p>
          </table:table-cell>
          <table:table-cell table:style-name="cell" office:value-type="string">
            <text:p>Graph visualization &amp; subgraph</text:p>
          </table:table-cell>
          <table:table-cell table:style-name="cell" office:value-type="string">
            <text:p>Knowledge Graph</text:p>
          </table:table-cell>
          <table:table-cell table:style-name="cell" office:value-type="string">
            <text:p>As a user, I want an interactive force-directed graph with search/expand so that I can explore entities and connections.</text:p>
          </table:table-cell>
          <table:table-cell table:style-name="cell" office:value-type="string">
            <text:p>GET /api/graph/visualization (limit 0-10000, include_neighbors); POST /api/graph/subgraph (List[str]); force-graph-2d canvas, node search, node-limit dropdown, hide-disconnected, click-&gt;EntityPanel expand via getEntityRelationships+subgraph. ?entity= deep-link.</text:p>
          </table:table-cell>
          <table:table-cell table:style-name="cell" office:value-type="string">
            <text:p>limit 0 = all; 422 if subgraph body not list; empty/no-connections states; 10k stress; Brave hit-detection fallback; fullscreen errors caught.</text:p>
          </table:table-cell>
          <table:table-cell table:style-name="cell" office:value-type="string">
            <text:p>limit ge0 le10000.</text:p>
          </table:table-cell>
          <table:table-cell table:style-name="cell" office:value-type="string">
            <text:p>getGraphVisualization, searchEntities, getGraphSubgraph, getEntityDetails, getEntityRelationships.</text:p>
          </table:table-cell>
          <table:table-cell table:style-name="cell" office:value-type="string">
            <text:p>Client renders up to 10k nodes.</text:p>
          </table:table-cell>
          <table:table-cell table:style-name="cell" office:value-type="string">
            <text:p>Happy: render+search+expand. Boundary: limit 0/10000/10001 -&gt; 422. Perf: 10k node render. Error: subgraph non-list body -&gt; 422. Responsive: touch pan/zoom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ENT-001</text:p>
          </table:table-cell>
          <table:table-cell table:style-name="cell" office:value-type="string">
            <text:p>Entity browse/search/paginate</text:p>
          </table:table-cell>
          <table:table-cell table:style-name="cell" office:value-type="string">
            <text:p>Entities</text:p>
          </table:table-cell>
          <table:table-cell table:style-name="cell" office:value-type="string">
            <text:p>As a user, I want to browse, search and filter entities by type so that I can inspect the graph.</text:p>
          </table:table-cell>
          <table:table-cell table:style-name="cell" office:value-type="string">
            <text:p>GET /api/graph/entities (entity_type?, limit 1-1000, skip&gt;=0, search?); /entity-types; /entity/{name} (max_hops 1-3, 404); /search (query min1, 422 empty). UI server-paginated 50/page + 300ms debounce.</text:p>
          </table:table-cell>
          <table:table-cell table:style-name="cell" office:value-type="string">
            <text:p>404 entity; 422 empty search; empty vs filtered-empty states.</text:p>
          </table:table-cell>
          <table:table-cell table:style-name="cell" office:value-type="string">
            <text:p>limit ge1 le1000, skip ge0, search min_length 1.</text:p>
          </table:table-cell>
          <table:table-cell table:style-name="cell" office:value-type="string">
            <text:p>neo4j fulltext+vector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list/search/filter. Boundary: limit 1/1000/1001, skip 0/neg, empty query -&gt; 422. Error: unknown entity -&gt; 404.</text:p>
          </table:table-cell>
          <table:table-cell table:style-name="cell" office:value-type="string">
            <text:p>Tested (entity resolution slices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ENT-002</text:p>
          </table:table-cell>
          <table:table-cell table:style-name="cell" office:value-type="string">
            <text:p>Entity edit &amp; merge</text:p>
          </table:table-cell>
          <table:table-cell table:style-name="cell" office:value-type="string">
            <text:p>Entities</text:p>
          </table:table-cell>
          <table:table-cell table:style-name="cell" office:value-type="string">
            <text:p>As a user, I want to edit an entity's name/description and merge duplicates so that I can curate the graph.</text:p>
          </table:table-cell>
          <table:table-cell table:style-name="cell" office:value-type="string">
            <text:p>PATCH /api/graph/entity/{name} (name 1-500, desc&lt;=5000; 400 on invalid/duplicate). POST /api/entities/merge (canonical+merge[]; LLM merged description, falls back to longest; 404 missing). GET /api/entities/merge-history (limit 1-500; 403 for restricted keys).</text:p>
          </table:table-cell>
          <table:table-cell table:style-name="cell" office:value-type="string">
            <text:p>Duplicate name -&gt; 400; merge missing entity -&gt; 404; LLM failure -&gt; longest-desc fallback; merge-history restricted -&gt; 403.</text:p>
          </table:table-cell>
          <table:table-cell table:style-name="cell" office:value-type="string">
            <text:p>name 1-500, description&lt;=5000.</text:p>
          </table:table-cell>
          <table:table-cell table:style-name="cell" office:value-type="string">
            <text:p>neo4j, LLM, rapidfuzz.</text:p>
          </table:table-cell>
          <table:table-cell table:style-name="cell" office:value-type="string">
            <text:p>Merge is irreversible (history kept).</text:p>
          </table:table-cell>
          <table:table-cell table:style-name="cell" office:value-type="string">
            <text:p>Happy: edit+merge. Error: dup name -&gt; 400, merge missing -&gt; 404. Boundary: name 1/500/501, desc 5000/5001. Permission: restricted key merge-history -&gt; 403. Degradation: LLM down -&gt; fallback desc.</text:p>
          </table:table-cell>
          <table:table-cell table:style-name="cell" office:value-type="string">
            <text:p>Tested (test_entity_resolution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EDUP-001</text:p>
          </table:table-cell>
          <table:table-cell table:style-name="cell" office:value-type="string">
            <text:p>Deduplication scan &amp; merge UI</text:p>
          </table:table-cell>
          <table:table-cell table:style-name="cell" office:value-type="string">
            <text:p>Deduplicate</text:p>
          </table:table-cell>
          <table:table-cell table:style-name="cell" office:value-type="string">
            <text:p>As a user, I want to scan for duplicate entities by similarity and merge them so that the graph stays clean.</text:p>
          </table:table-cell>
          <table:table-cell table:style-name="cell" office:value-type="string">
            <text:p>/deduplicate page; GET /api/entities/duplicates (threshold 0.5-1.0 default 0.75, limit 1-500; 5-min timeout -&gt; 504). UI threshold 75-95% (default 85%), groups with canonical/exclude/add/Inspect/Merge/Dismiss(localStorage), History modal, ?entity= focus.</text:p>
          </table:table-cell>
          <table:table-cell table:style-name="cell" office:value-type="string">
            <text:p>Scan timeout -&gt; 504; dismissed groups persist; add-search &gt;=2 chars; merge sends only non-canonical/non-removed.</text:p>
          </table:table-cell>
          <table:table-cell table:style-name="cell" office:value-type="string">
            <text:p>threshold ge0.5 le1.0; limit ge1 le500.</text:p>
          </table:table-cell>
          <table:table-cell table:style-name="cell" office:value-type="string">
            <text:p>suggestDuplicates, mergeEntities, getMergeHistory, getStats, searchEntities, getEntityDetails.</text:p>
          </table:table-cell>
          <table:table-cell table:style-name="cell" office:value-type="string">
            <text:p>rapidfuzz similarity.</text:p>
          </table:table-cell>
          <table:table-cell table:style-name="cell" office:value-type="string">
            <text:p>Happy: scan+merge group. Boundary: threshold 0.5/1.0/0.49, limit 500/501. Error: large graph scan -&gt; 504. Edge: dismiss persists across reload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REL-001</text:p>
          </table:table-cell>
          <table:table-cell table:style-name="cell" office:value-type="string">
            <text:p>Relationship browse &amp; analyze</text:p>
          </table:table-cell>
          <table:table-cell table:style-name="cell" office:value-type="string">
            <text:p>Relationships</text:p>
          </table:table-cell>
          <table:table-cell table:style-name="cell" office:value-type="string">
            <text:p>As a user, I want to browse relationships and run Phase-B relationship analysis so that cross-document connections are surfaced.</text:p>
          </table:table-cell>
          <table:table-cell table:style-name="cell" office:value-type="string">
            <text:p>GET /api/graph/relationships (rel_type?, limit 1-1000, skip, search?); /relationship-types; /entity/{name}/relationships (max_depth 1-3, limit 1-200, 404). POST /api/graph/relationships/analyze (400 if extraction off; scope full/recent, rebuild deletes batch rels, chain community_detection) -&gt; task_id. DELETE all relationships (destructive).</text:p>
          </table:table-cell>
          <table:table-cell table:style-name="cell" office:value-type="string">
            <text:p>404 entity; 400 extraction disabled; rebuild deletes then recomputes; weight shown only when non-null.</text:p>
          </table:table-cell>
          <table:table-cell table:style-name="cell" office:value-type="string">
            <text:p>limits/skip bounds; collection access.</text:p>
          </table:table-cell>
          <table:table-cell table:style-name="cell" office:value-type="string">
            <text:p>neo4j, LLM, task store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browse + analyze task. Error: extraction off -&gt; 400, unknown entity -&gt; 404. Boundary: max_depth 1/3/4, limit bounds. Destructive: rebuild + delete-all confirm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OM-001</text:p>
          </table:table-cell>
          <table:table-cell table:style-name="cell" office:value-type="string">
            <text:p>Community detection &amp; summarization</text:p>
          </table:table-cell>
          <table:table-cell table:style-name="cell" office:value-type="string">
            <text:p>Communities</text:p>
          </table:table-cell>
          <table:table-cell table:style-name="cell" office:value-type="string">
            <text:p>As a user, I want to detect entity communities and summarize them so that I get thematic clusters of the graph.</text:p>
          </table:table-cell>
          <table:table-cell table:style-name="cell" office:value-type="string">
            <text:p>POST /api/graph/communities/detect (400 if disabled; min_size 2-20, collection access) -&gt; task_id; deletes prior, runs Leiden/Louvain, optional LLM summary. POST /summarize (community_ids?, force_regenerate; 400 if disabled/LLM unavailable; skips summarized unless forced). GET list/search/{id}; DELETE {id}/all (unlink entities).</text:p>
          </table:table-cell>
          <table:table-cell table:style-name="cell" office:value-type="string">
            <text:p>Detection disabled -&gt; 400; community_id int-typed routing (search path safe); 404 not in accessible collections; summarize skip-already.</text:p>
          </table:table-cell>
          <table:table-cell table:style-name="cell" office:value-type="string">
            <text:p>min_size ge2 le20; community_id int.</text:p>
          </table:table-cell>
          <table:table-cell table:style-name="cell" office:value-type="string">
            <text:p>neo4j (GDS Leiden/Louvain), LLM.</text:p>
          </table:table-cell>
          <table:table-cell table:style-name="cell" office:value-type="string">
            <text:p>Detection deletes prior communities each run.</text:p>
          </table:table-cell>
          <table:table-cell table:style-name="cell" office:value-type="string">
            <text:p>Happy: detect+summarize. Error: disabled -&gt; 400. Boundary: min_size 2/20/1/21, empty graph. Edge: re-summarize force vs skip; delete unlinks not deletes entities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Leiden/Louvain detection has no automated test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OM-002</text:p>
          </table:table-cell>
          <table:table-cell table:style-name="cell" office:value-type="string">
            <text:p>Community browse UI &amp; staleness</text:p>
          </table:table-cell>
          <table:table-cell table:style-name="cell" office:value-type="string">
            <text:p>Communities</text:p>
          </table:table-cell>
          <table:table-cell table:style-name="cell" office:value-type="string">
            <text:p>As a user, I want to browse community cards with summaries and staleness cues so that I know when to re-detect.</text:p>
          </table:table-cell>
          <table:table-cell table:style-name="cell" office:value-type="string">
            <text:p>Explore communities tab (25/page) + Collections CommunitySection (Detect/Summarize/Delete All, resumable via localStorage task key). Cards show name, entity_count, cleaned summary, sample chips; detail modal lazy-loads members.</text:p>
          </table:table-cell>
          <table:table-cell table:style-name="cell" office:value-type="string">
            <text:p>Empty 'No Communities Detected' (-&gt;Extract) vs search-empty; detection resumes on reload.</text:p>
          </table:table-cell>
          <table:table-cell table:style-name="cell" office:value-type="string">
            <text:p/>
          </table:table-cell>
          <table:table-cell table:style-name="cell" office:value-type="string">
            <text:p>getCommunitiesPaginated, getCommunity, detectCommunities, summarizeCommunities, deleteCommunity, deleteAllCommunities, pollTask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browse+detail. Edge: resume detection after reload. Empty: no communities CTA. Responsive: card grid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EARCH-001</text:p>
          </table:table-cell>
          <table:table-cell table:style-name="cell" office:value-type="string">
            <text:p>Hybrid search</text:p>
          </table:table-cell>
          <table:table-cell table:style-name="cell" office:value-type="string">
            <text:p>Search/RAG</text:p>
          </table:table-cell>
          <table:table-cell table:style-name="cell" office:value-type="string">
            <text:p>As a user/integrator, I want hybrid vector+keyword+metadata search so that I can retrieve relevant chunks.</text:p>
          </table:table-cell>
          <table:table-cell table:style-name="cell" office:value-type="string">
            <text:p>POST /api/search (read+quota+rate-limit) {query, top_k 1-50 default 5, filters?}. RRF fusion; filters.collection_id checked (403); restricted keys scoped. Returns SearchResponse{results[], total_results}.</text:p>
          </table:table-cell>
          <table:table-cell table:style-name="cell" office:value-type="string">
            <text:p>403 collection; empty results; 500 on error.</text:p>
          </table:table-cell>
          <table:table-cell table:style-name="cell" office:value-type="string">
            <text:p>top_k ge1 le50.</text:p>
          </table:table-cell>
          <table:table-cell table:style-name="cell" office:value-type="string">
            <text:p>neo4j vector+fulltext, embeddings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query -&gt; ranked results. Boundary: top_k 1/50/51 -&gt; 422, empty query. Permission: scoped collection -&gt; 403. Perf: large corpus latency.</text:p>
          </table:table-cell>
          <table:table-cell table:style-name="cell" office:value-type="string">
            <text:p>Tested (HTTP contract 422 + RRF unit + LIVE E2E real hybrid search returns results vs 156-doc/5.3k-entity graph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Validation + RRF math unit-tested; real hybrid search (live embeddings + Neo4j) executed end-to-end against the running deployment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SK-001</text:p>
          </table:table-cell>
          <table:table-cell table:style-name="cell" office:value-type="string">
            <text:p>Ask (non-streaming GraphRAG)</text:p>
          </table:table-cell>
          <table:table-cell table:style-name="cell" office:value-type="string">
            <text:p>Search/RAG</text:p>
          </table:table-cell>
          <table:table-cell table:style-name="cell" office:value-type="string">
            <text:p>As an integrator, I want a non-streaming Q&amp;A endpoint so that I can get a grounded answer with sources.</text:p>
          </table:table-cell>
          <table:table-cell table:style-name="cell" office:value-type="string">
            <text:p>POST /api/ask (read+quota+rate-limit). RAGRequest with top_k 1-20, use_graph, max_hops 1-3, use_reranking, use_agentic, use_fast_search, collection_id. Returns RAGResponse{answer, sources[], graph_context?, reranked}. Bounded by ASK_DEADLINE_SECONDS -&gt; 504 (work continues in bg).</text:p>
          </table:table-cell>
          <table:table-cell table:style-name="cell" office:value-type="string">
            <text:p>use_agentic=true while ENABLE_AGENT_RESEARCH on -&gt; 400 agentic_requires_streaming; 403 collection; 504 deadline (duplicate-work risk); HTTPExceptions preserved.</text:p>
          </table:table-cell>
          <table:table-cell table:style-name="cell" office:value-type="string">
            <text:p>top_k ge1 le20, max_hops ge1 le3.</text:p>
          </table:table-cell>
          <table:table-cell table:style-name="cell" office:value-type="string">
            <text:p>neo4j, LLM, reranker.</text:p>
          </table:table-cell>
          <table:table-cell table:style-name="cell" office:value-type="string">
            <text:p>Deadline cancels response, not background work.</text:p>
          </table:table-cell>
          <table:table-cell table:style-name="cell" office:value-type="string">
            <text:p>Happy: question -&gt; answer+sources. Error: agentic+research-on -&gt; 400, slow -&gt; 504. Boundary: top_k/max_hops bounds. Permission: scoped collection -&gt; 403.</text:p>
          </table:table-cell>
          <table:table-cell table:style-name="cell" office:value-type="string">
            <text:p>Tested (deadline wiring test_resilience; HTTP contract 422; LIVE E2E confirmed 504 deadline_exceeded after 28s with retry guidance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504 deadline behavior verified end-to-end against live deployment (directs to /api/ask/stream). 504 leaves background work uncancelled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SK-002</text:p>
          </table:table-cell>
          <table:table-cell table:style-name="cell" office:value-type="string">
            <text:p>Ask streaming chat (SSE)</text:p>
          </table:table-cell>
          <table:table-cell table:style-name="cell" office:value-type="string">
            <text:p>Search/RAG</text:p>
          </table:table-cell>
          <table:table-cell table:style-name="cell" office:value-type="string">
            <text:p>As a user, I want streaming grounded chat answers with inspectable sources so that I can trust and explore answers fast.</text:p>
          </table:table-cell>
          <table:table-cell table:style-name="cell" office:value-type="string">
            <text:p>POST /api/ask/stream (SSE). 400 if no OPENAI_API_KEY. Paths: agentic (ENABLE_AGENTIC_RAG), fast_search (vector-only), standard (agent-chat if ENABLE_AGENT_CHAT else legacy hybrid+rerank+writer). Events: content/sources/graph_context/status/done/error/memory_update; heartbeat ': ping'; terminal 'event: shutdown' on restart. Prompt-injection -&gt; safe refusal.</text:p>
          </table:table-cell>
          <table:table-cell table:style-name="cell" office:value-type="string">
            <text:p>Errors emitted as data:{error} (HTTP 200 after stream starts); reasoning OFF by default; conversation_memory opaque dict; source modal highlights cited chunk.</text:p>
          </table:table-cell>
          <table:table-cell table:style-name="cell" office:value-type="string">
            <text:p>RAGRequest fields.</text:p>
          </table:table-cell>
          <table:table-cell table:style-name="cell" office:value-type="string">
            <text:p>LLM, neo4j, reranker, prompt_security.</text:p>
          </table:table-cell>
          <table:table-cell table:style-name="cell" office:value-type="string">
            <text:p>Clients reconnect on shutdown frame.</text:p>
          </table:table-cell>
          <table:table-cell table:style-name="cell" office:value-type="string">
            <text:p>Happy: stream tokens+sources+done. Error: no key -&gt; 400, mid-stream error frame. Edge: shutdown frame on restart, heartbeat during silence. Security: injection -&gt; refusal. Responsive: source modal mobile.</text:p>
          </table:table-cell>
          <table:table-cell table:style-name="cell" office:value-type="string">
            <text:p>Tested (test_context_curator + LIVE E2E SSE: fast-search stream delivers content+done, no error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Chat answer layer: reasoning off + 2 speed iterations. Memory logic unit-tested; streaming chat executed end-to-end against live LLM+Neo4j (standard agentic path is &gt;90s, fast path streams content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RES-001</text:p>
          </table:table-cell>
          <table:table-cell table:style-name="cell" office:value-type="string">
            <text:p>Deep research (thinking stream)</text:p>
          </table:table-cell>
          <table:table-cell table:style-name="cell" office:value-type="string">
            <text:p>Search/RAG</text:p>
          </table:table-cell>
          <table:table-cell table:style-name="cell" office:value-type="string">
            <text:p>As a user, I want multi-step deep research with visible thinking/sub-questions so that complex questions get thorough answers.</text:p>
          </table:table-cell>
          <table:table-cell table:style-name="cell" office:value-type="string">
            <text:p>POST /api/ask/stream/thinking (SSE). 400 if no OPENAI_API_KEY; 403 collection. Agent quality mode or legacy agentic. Events: thinking/search/retrieval/sub_questions/sources/graph_context/content/done/error. UI Deep Research toggle (mid-session), research-process steps.</text:p>
          </table:table-cell>
          <table:table-cell table:style-name="cell" office:value-type="string">
            <text:p>Long-running; sub-question fan-out; researcher/writer agents + tools (incl http_request skill, git_repo).</text:p>
          </table:table-cell>
          <table:table-cell table:style-name="cell" office:value-type="string">
            <text:p>RAGRequest fields.</text:p>
          </table:table-cell>
          <table:table-cell table:style-name="cell" office:value-type="string">
            <text:p>researcher_agent, research_prompts, skills, LLM, neo4j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deep research -&gt; thinking+subq+answer. Error: no key -&gt; 400. Permission: scoped collection -&gt; 403. Perf: long multi-step latency.</text:p>
          </table:table-cell>
          <table:table-cell table:style-name="cell" office:value-type="string">
            <text:p>Tested (prompt/tool assembly + loop helpers: merge/dedup/truncate/substitute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Researcher helpers unit-tested (test_researcher_helpers); full tool-calling loop needs a mocked LLM (live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KILL-001</text:p>
          </table:table-cell>
          <table:table-cell table:style-name="cell" office:value-type="string">
            <text:p>Agent Skills management</text:p>
          </table:table-cell>
          <table:table-cell table:style-name="cell" office:value-type="string">
            <text:p>Skills</text:p>
          </table:table-cell>
          <table:table-cell table:style-name="cell" office:value-type="string">
            <text:p>As an admin, I want to install, configure, enable/disable and uninstall agent skills so that I can extend the agent's tools.</text:p>
          </table:table-cell>
          <table:table-cell table:style-name="cell" office:value-type="string">
            <text:p>Admin skills endpoints (gated by ENABLE_SKILLS at discovery): list/registry-search/get/install(url|registry_id)/patch(enabled)/delete/discover/analyze/config GET+PUT. Install neither arg -&gt; 400; upstream HTTP error -&gt; 502. Config secret masking (********). Auto-activation + http_request tool + LLM config wizard.</text:p>
          </table:table-cell>
          <table:table-cell table:style-name="cell" office:value-type="string">
            <text:p>Neither url nor registry_id -&gt; 400; ValueError -&gt; 400; upstream fetch error -&gt; 502; masked values preserve existing secrets; 404 unknown skill.</text:p>
          </table:table-cell>
          <table:table-cell table:style-name="cell" office:value-type="string">
            <text:p>SKILL.md frontmatter (PyYAML); install args.</text:p>
          </table:table-cell>
          <table:table-cell table:style-name="cell" office:value-type="string">
            <text:p>skill_service, external registry HTTP, LLM (analyze), crypto (secrets).</text:p>
          </table:table-cell>
          <table:table-cell table:style-name="cell" office:value-type="string">
            <text:p>skills.sh registry reachable.</text:p>
          </table:table-cell>
          <table:table-cell table:style-name="cell" office:value-type="string">
            <text:p>Happy: install+configure+enable. Error: no install arg -&gt; 400, registry down -&gt; 502, unknown id -&gt; 404. Security: secret masking round-trip; injected SKILL.md. Edge: disabled flag hides from agent.</text:p>
          </table:table-cell>
          <table:table-cell table:style-name="cell" office:value-type="string">
            <text:p>Tested (catalog TTL cache + SKILL.md parse/sanitize/env-boundary: test_skill_service_helpers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Parsing/ID-sanitization + SKILL_-prefix env security boundary covered; live install/http_request/wizard need network+LLM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GIT-001</text:p>
          </table:table-cell>
          <table:table-cell table:style-name="cell" office:value-type="string">
            <text:p>Git connector (verify/browse/CRUD)</text:p>
          </table:table-cell>
          <table:table-cell table:style-name="cell" office:value-type="string">
            <text:p>Git Integration</text:p>
          </table:table-cell>
          <table:table-cell table:style-name="cell" office:value-type="string">
            <text:p>As an admin, I want to connect GitHub/GitLab/Gitea repos so that their files sync into the KB.</text:p>
          </table:table-cell>
          <table:table-cell table:style-name="cell" office:value-type="string">
            <text:p>Git endpoints (gated ENABLE_GIT_INTEGRATION -&gt; 404 when off; all admin). verify (vendor, pat min8) returns valid:false (not error) on bad creds; browse (PAT as query param); connections CRUD; PATs Fernet-encrypted at rest, masked ••••last4. Create: invalid creds 400, repo not found 404, provider error 502.</text:p>
          </table:table-cell>
          <table:table-cell table:style-name="cell" office:value-type="string">
            <text:p>Integration disabled -&gt; 404; invalid creds non-error on verify; PAT in query param on browse; provider error -&gt; 502.</text:p>
          </table:table-cell>
          <table:table-cell table:style-name="cell" office:value-type="string">
            <text:p>vendor enum github/gitlab/gitea; pat min_length 8; sync_interval_minutes ge0; access_level read/read_write.</text:p>
          </table:table-cell>
          <table:table-cell table:style-name="cell" office:value-type="string">
            <text:p>git_providers, crypto_service, provider APIs.</text:p>
          </table:table-cell>
          <table:table-cell table:style-name="cell" office:value-type="string">
            <text:p>PAT scoped appropriately by user.</text:p>
          </table:table-cell>
          <table:table-cell table:style-name="cell" office:value-type="string">
            <text:p>Happy: verify+connect+list. Error: bad pat -&gt; valid:false, repo missing -&gt; 404, disabled -&gt; 404, provider 5xx -&gt; 502. Security: PAT encrypted+masked; token scrub in FETCH_HEAD. Boundary: pat 7/8 chars.</text:p>
          </table:table-cell>
          <table:table-cell table:style-name="cell" office:value-type="string">
            <text:p>Tested (test_git_providers, test_git_sync, test_crypto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GIT-002</text:p>
          </table:table-cell>
          <table:table-cell table:style-name="cell" office:value-type="string">
            <text:p>Git incremental sync engine</text:p>
          </table:table-cell>
          <table:table-cell table:style-name="cell" office:value-type="string">
            <text:p>Git Integration</text:p>
          </table:table-cell>
          <table:table-cell table:style-name="cell" office:value-type="string">
            <text:p>As an admin, I want incremental clone+diff sync (manual + scheduled) so that repo changes flow into the KB without full re-ingest.</text:p>
          </table:table-cell>
          <table:table-cell table:style-name="cell" office:value-type="string">
            <text:p>POST connections/{id}/sync -&gt; task_id (409 if already running); change-set via clone/diff/ls-tree incl renames; glob include/exclude filters; supported-extension filter; orphaned-doc detection; background scheduler polls every GIT_SYNC_POLL_INTERVAL for due connections (sync_interval_minutes&gt;0). Document provenance recorded.</text:p>
          </table:table-cell>
          <table:table-cell table:style-name="cell" office:value-type="string">
            <text:p>Concurrent sync -&gt; 409; per-connection lock serializes; rename R100 identical-content; image/binary excluded; glob precedence (exclude wins); token scrubbed from FETCH_HEAD.</text:p>
          </table:table-cell>
          <table:table-cell table:style-name="cell" office:value-type="string">
            <text:p>globs (pathspec); supported extensions.</text:p>
          </table:table-cell>
          <table:table-cell table:style-name="cell" office:value-type="string">
            <text:p>git binary, git_connector_service, document_processor.</text:p>
          </table:table-cell>
          <table:table-cell table:style-name="cell" office:value-type="string">
            <text:p>git binary on PATH; network to provider.</text:p>
          </table:table-cell>
          <table:table-cell table:style-name="cell" office:value-type="string">
            <text:p>Happy: initial + incremental sync. Edge: rename, delete-&gt;orphaned, glob filter, unsupported ext skipped. Error: concurrent sync -&gt; 409. Security: token scrub.</text:p>
          </table:table-cell>
          <table:table-cell table:style-name="cell" office:value-type="string">
            <text:p>Tested (test_git_sync) + Documented</text:p>
          </table:table-cell>
          <table:table-cell table:style-name="cell" office:value-type="string">
            <text:p>1</text:p>
          </table:table-cell>
          <table:table-cell table:style-name="cell" office:value-type="string">
            <text:p>Medium</text:p>
          </table:table-cell>
          <table:table-cell table:style-name="cell" office:value-type="string">
            <text:p>D-001 fixed here (extension check forced full DocumentProcessor build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TURBO-001</text:p>
          </table:table-cell>
          <table:table-cell table:style-name="cell" office:value-type="string">
            <text:p>Turbo mode (Compute3 GPU)</text:p>
          </table:table-cell>
          <table:table-cell table:style-name="cell" office:value-type="string">
            <text:p>Turbo</text:p>
          </table:table-cell>
          <table:table-cell table:style-name="cell" office:value-type="string">
            <text:p>As an admin, I want to launch/monitor a GPU inference job so that I can accelerate processing/queries.</text:p>
          </table:table-cell>
          <table:table-cell table:style-name="cell" office:value-type="string">
            <text:p>Turbo endpoints: status (read), balance/start/stop/extend/jobs (admin). 400 'not available' if COMPUTE3_API_KEY unset (status returns available:false). start (runtime 60-86400, gpu_count 1-8); extend (additional_seconds required 60-86400, 404 no active job); stop (no job -&gt; message). /turbo page polls status+jobs 10s with live vLLM log viewer.</text:p>
          </table:table-cell>
          <table:table-cell table:style-name="cell" office:value-type="string">
            <text:p>Key unset -&gt; 400/available:false; already-running start returns existing job; extend no job -&gt; 404; balance fetch failure tolerated.</text:p>
          </table:table-cell>
          <table:table-cell table:style-name="cell" office:value-type="string">
            <text:p>runtime ge60 le86400; gpu_count ge1 le8; additional_seconds required.</text:p>
          </table:table-cell>
          <table:table-cell table:style-name="cell" office:value-type="string">
            <text:p>compute3_service, Compute3 API.</text:p>
          </table:table-cell>
          <table:table-cell table:style-name="cell" office:value-type="string">
            <text:p>Turbo overrides extraction+main model configs.</text:p>
          </table:table-cell>
          <table:table-cell table:style-name="cell" office:value-type="string">
            <text:p>Happy: start-&gt;ready-&gt;stop. Error: no key -&gt; 400, extend no job -&gt; 404. Boundary: runtime 60/86400/59, gpu_count 1/8/9. Security: API key never exposed in status.</text:p>
          </table:table-cell>
          <table:table-cell table:style-name="cell" office:value-type="string">
            <text:p>Tested (test_compute3_turbo) + Documented</text:p>
          </table:table-cell>
          <table:table-cell table:style-name="cell" office:value-type="string">
            <text:p>1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D-002 fixed: latent wait_for_ready readiness path (get_auth_token + 4-arg set_turbo_mode_state). Added regression tests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DMIN-001</text:p>
          </table:table-cell>
          <table:table-cell table:style-name="cell" office:value-type="string">
            <text:p>System configuration view</text:p>
          </table:table-cell>
          <table:table-cell table:style-name="cell" office:value-type="string">
            <text:p>Admin</text:p>
          </table:table-cell>
          <table:table-cell table:style-name="cell" office:value-type="string">
            <text:p>As an admin, I want to view all non-secret system config so that I can verify the deployment.</text:p>
          </table:table-cell>
          <table:table-cell table:style-name="cell" office:value-type="string">
            <text:p>GET /api/admin/config -&gt; SystemConfigResponse (LLM/embedding/vision models, chunking, RAG/community/entity flags, turbo, skills, git). No secrets. UI: 6 collapsible read-only sections; Vision/Turbo conditional.</text:p>
          </table:table-cell>
          <table:table-cell table:style-name="cell" office:value-type="string">
            <text:p>Vision/Turbo blocks hidden when unavailable.</text:p>
          </table:table-cell>
          <table:table-cell table:style-name="cell" office:value-type="string">
            <text:p/>
          </table:table-cell>
          <table:table-cell table:style-name="cell" office:value-type="string">
            <text:p>config.py.</text:p>
          </table:table-cell>
          <table:table-cell table:style-name="cell" office:value-type="string">
            <text:p>No secret leakage.</text:p>
          </table:table-cell>
          <table:table-cell table:style-name="cell" office:value-type="string">
            <text:p>Happy: config renders. Security: assert no API keys/secrets in payload. Permission: non-admin -&gt; 403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DMIN-002</text:p>
          </table:table-cell>
          <table:table-cell table:style-name="cell" office:value-type="string">
            <text:p>API key management UI+API</text:p>
          </table:table-cell>
          <table:table-cell table:style-name="cell" office:value-type="string">
            <text:p>Admin</text:p>
          </table:table-cell>
          <table:table-cell table:style-name="cell" office:value-type="string">
            <text:p>As an admin, I want to create/list/revoke/activate/delete API keys with permissions and collection scope so that I can grant scoped access.</text:p>
          </table:table-cell>
          <table:table-cell table:style-name="cell" office:value-type="string">
            <text:p>Admin api-keys endpoints. Create (name 1-100, &gt;=1 permission, scope all/restricted+allowed_collections) returns plaintext key once. Restricted without collections -&gt; 400; nonexistent collection -&gt; 400. key_id='admin' protected (403 on patch/delete/revoke). Stats + usage-history (days 1-365). UI: list w/ stats, analytics modal w/ charts.</text:p>
          </table:table-cell>
          <table:table-cell table:style-name="cell" office:value-type="string">
            <text:p>with-stats route declared before {key_id}; admin key protected; one-time secret reveal.</text:p>
          </table:table-cell>
          <table:table-cell table:style-name="cell" office:value-type="string">
            <text:p>name 1-100, permissions min1, restricted requires collections, days ge1 le365.</text:p>
          </table:table-cell>
          <table:table-cell table:style-name="cell" office:value-type="string">
            <text:p>api_key_service, api_usage_service.</text:p>
          </table:table-cell>
          <table:table-cell table:style-name="cell" office:value-type="string">
            <text:p>Key shown once, hashed at rest.</text:p>
          </table:table-cell>
          <table:table-cell table:style-name="cell" office:value-type="string">
            <text:p>Happy: create+revoke+activate. Error: restricted no collections -&gt; 400, modify admin -&gt; 403, missing -&gt; 404. Boundary: name 1/100/101, days 1/365/366. Security: secret only shown once; hashed storage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api_key_service/api_usage_service untested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DMIN-003</text:p>
          </table:table-cell>
          <table:table-cell table:style-name="cell" office:value-type="string">
            <text:p>System reset (danger zone)</text:p>
          </table:table-cell>
          <table:table-cell table:style-name="cell" office:value-type="string">
            <text:p>Admin</text:p>
          </table:table-cell>
          <table:table-cell table:style-name="cell" office:value-type="string">
            <text:p>As an admin, I want a granular destructive reset so that I can wipe selected data with explicit confirmation.</text:p>
          </table:table-cell>
          <table:table-cell table:style-name="cell" office:value-type="string">
            <text:p>POST /api/admin/reset {delete_documents, delete_uploaded_files, delete_custom_inputs, delete_collections, delete_api_keys(default false)}. Irreversible. Cancels processing, deletes per flags, returns counts. UI: 5 checkboxes + typed-DELETE confirm + &gt;=1 option.</text:p>
          </table:table-cell>
          <table:table-cell table:style-name="cell" office:value-type="string">
            <text:p>API keys delete defaults off; typed-DELETE gate; reset on empty KB.</text:p>
          </table:table-cell>
          <table:table-cell table:style-name="cell" office:value-type="string">
            <text:p>typed 'DELETE'; &gt;=1 option; admin only.</text:p>
          </table:table-cell>
          <table:table-cell table:style-name="cell" office:value-type="string">
            <text:p>neo4j, filesystem, task store.</text:p>
          </table:table-cell>
          <table:table-cell table:style-name="cell" office:value-type="string">
            <text:p>Irreversible.</text:p>
          </table:table-cell>
          <table:table-cell table:style-name="cell" office:value-type="string">
            <text:p>Happy: reset docs only -&gt; counts. Boundary: no option selected (UI block). Security: requires typed DELETE; non-admin -&gt; 403. Edge: reset empty KB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DMIN-004</text:p>
          </table:table-cell>
          <table:table-cell table:style-name="cell" office:value-type="string">
            <text:p>Library export/import</text:p>
          </table:table-cell>
          <table:table-cell table:style-name="cell" office:value-type="string">
            <text:p>Admin</text:p>
          </table:table-cell>
          <table:table-cell table:style-name="cell" office:value-type="string">
            <text:p>As an admin, I want full library export/import so that I can back up and migrate the KB.</text:p>
          </table:table-cell>
          <table:table-cell table:style-name="cell" office:value-type="string">
            <text:p>POST /api/admin/export -&gt; task_id (409 if export/import running); GET export/{task_id}/download (404/400 states, streams ZIP); POST /api/admin/import multipart (mode clean|replace, 409 if in progress). clean requires empty target; replace wipes first. UI: export state machine + import (replace requires typed DELETE).</text:p>
          </table:table-cell>
          <table:table-cell table:style-name="cell" office:value-type="string">
            <text:p>Concurrent export/import -&gt; 409; download before complete -&gt; 400; cleaned-up result -&gt; 404; clean into non-empty target rejected.</text:p>
          </table:table-cell>
          <table:table-cell table:style-name="cell" office:value-type="string">
            <text:p>mode pattern ^(clean|replace)$; caps (MAX_*) enforced on import.</text:p>
          </table:table-cell>
          <table:table-cell table:style-name="cell" office:value-type="string">
            <text:p>library_transfer_service.</text:p>
          </table:table-cell>
          <table:table-cell table:style-name="cell" office:value-type="string">
            <text:p>ZIP format round-trips.</text:p>
          </table:table-cell>
          <table:table-cell table:style-name="cell" office:value-type="string">
            <text:p>Happy: export-&gt;download-&gt;import. Error: concurrent -&gt; 409, download early -&gt; 400. Boundary: import exceeding MAX_* caps -&gt; 403. Edge: replace wipes; clean into non-empty.</text:p>
          </table:table-cell>
          <table:table-cell table:style-name="cell" office:value-type="string">
            <text:p>Tested (import caps + NDJSON round-trip: test_library_transfer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Serialization/round-trip primitives now unit-tested; full live export-&gt;import is manual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ADMIN-005</text:p>
          </table:table-cell>
          <table:table-cell table:style-name="cell" office:value-type="string">
            <text:p>Statistics dashboard &amp; API usage analytics</text:p>
          </table:table-cell>
          <table:table-cell table:style-name="cell" office:value-type="string">
            <text:p>Admin</text:p>
          </table:table-cell>
          <table:table-cell table:style-name="cell" office:value-type="string">
            <text:p>As an admin, I want KB stats and per-key usage analytics so that I can monitor the system.</text:p>
          </table:table-cell>
          <table:table-cell table:style-name="cell" office:value-type="string">
            <text:p>GET /api/stats, /api/admin/stats/overview, /api/admin/api-keys/{id}/stats + usage-history. UI: KPI grid, processing breakdown, usage-trend area chart (7/14/30/90D), endpoint bar chart. StatsBar polls getStats 5s.</text:p>
          </table:table-cell>
          <table:table-cell table:style-name="cell" office:value-type="string">
            <text:p>stats/overview excluded from usage tracking; stats failure -&gt; empty body; orphan cleanup banner when docs=0 but entities exist.</text:p>
          </table:table-cell>
          <table:table-cell table:style-name="cell" office:value-type="string">
            <text:p>days ge1 le365.</text:p>
          </table:table-cell>
          <table:table-cell table:style-name="cell" office:value-type="string">
            <text:p>neo4j, api_usage_service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stats render + charts. Edge: orphan cleanup banner+confirm. Error: stats API fail -&gt; empty. Perf: 5s poll load.</text:p>
          </table:table-cell>
          <table:table-cell table:style-name="cell" office:value-type="string">
            <text:p>Tested (test_api_usage_service: endpoint categorization) + Documented</text:p>
          </table:table-cell>
          <table:table-cell table:style-name="cell" office:value-type="string">
            <text:p>1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D-003 fixed: usage endpoint categorization mislabeled custom-inputs detail path. Charts/aggregation remain manual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SYS-001</text:p>
          </table:table-cell>
          <table:table-cell table:style-name="cell" office:value-type="string">
            <text:p>Background task tracking</text:p>
          </table:table-cell>
          <table:table-cell table:style-name="cell" office:value-type="string">
            <text:p>System</text:p>
          </table:table-cell>
          <table:table-cell table:style-name="cell" office:value-type="string">
            <text:p>As a user, I want to poll/list/cleanup background tasks so that I can monitor long-running operations.</text:p>
          </table:table-cell>
          <table:table-cell table:style-name="cell" office:value-type="string">
            <text:p>GET /api/tasks/{id} (404), /{id}/result (404/202/500/200), GET /api/tasks (filters), DELETE /api/tasks/{id} (record only), POST /api/tasks/cleanup (max_age_hours 1-168). In-memory _task_store (lost on restart).</text:p>
          </table:table-cell>
          <table:table-cell table:style-name="cell" office:value-type="string">
            <text:p>404 after restart even for previously-valid IDs; result 202 while running, 500 with error if failed; delete does not stop running work.</text:p>
          </table:table-cell>
          <table:table-cell table:style-name="cell" office:value-type="string">
            <text:p>max_age_hours ge1 le168.</text:p>
          </table:table-cell>
          <table:table-cell table:style-name="cell" office:value-type="string">
            <text:p>in-memory store.</text:p>
          </table:table-cell>
          <table:table-cell table:style-name="cell" office:value-type="string">
            <text:p>Tasks not persisted across restart.</text:p>
          </table:table-cell>
          <table:table-cell table:style-name="cell" office:value-type="string">
            <text:p>Happy: poll task to completion. Boundary: max_age_hours 1/168/0/169. Edge: poll after restart -&gt; 404; result of failed -&gt; 500. 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In-memory store volatility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OBS-001</text:p>
          </table:table-cell>
          <table:table-cell table:style-name="cell" office:value-type="string">
            <text:p>Health, metrics &amp; observability</text:p>
          </table:table-cell>
          <table:table-cell table:style-name="cell" office:value-type="string">
            <text:p>Observability</text:p>
          </table:table-cell>
          <table:table-cell table:style-name="cell" office:value-type="string">
            <text:p>As an operator, I want health checks, Prometheus metrics and request-ID correlation so that I can monitor and trace the service.</text:p>
          </table:table-cell>
          <table:table-cell table:style-name="cell" office:value-type="string">
            <text:p>GET /health (public; healthy/degraded, 200 even if Neo4j down). GET /metrics (admin; 404 if METRICS_ENABLED=false, 501 if prometheus-client missing). X-Request-ID middleware echoes/forwards; LOG_FORMAT plain|json.</text:p>
          </table:table-cell>
          <table:table-cell table:style-name="cell" office:value-type="string">
            <text:p>Neo4j down -&gt; degraded (still 200); metrics disabled -&gt; 404; no prometheus lib -&gt; 501.</text:p>
          </table:table-cell>
          <table:table-cell table:style-name="cell" office:value-type="string">
            <text:p/>
          </table:table-cell>
          <table:table-cell table:style-name="cell" office:value-type="string">
            <text:p>logging_setup, metrics, neo4j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/health 200, /metrics text. Error: metrics off -&gt; 404, lib missing -&gt; 501. Security: /metrics requires admin. Edge: Neo4j down -&gt; degraded.</text:p>
          </table:table-cell>
          <table:table-cell table:style-name="cell" office:value-type="string">
            <text:p>Tested (test_observability + LIVE E2E: /health 200, /metrics 401) + docs gating (test_docs_exposure)</text:p>
          </table:table-cell>
          <table:table-cell table:style-name="cell" office:value-type="string">
            <text:p>1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D-004 fixed: interactive docs now disabled in production by default (EXPOSE_API_DOCS). Verified end-to-end against the running deployment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OBS-002</text:p>
          </table:table-cell>
          <table:table-cell table:style-name="cell" office:value-type="string">
            <text:p>Resilience: circuit breaker &amp; graceful shutdown</text:p>
          </table:table-cell>
          <table:table-cell table:style-name="cell" office:value-type="string">
            <text:p>Observability</text:p>
          </table:table-cell>
          <table:table-cell table:style-name="cell" office:value-type="string">
            <text:p>As an operator, I want helper-client circuit breaking, retries and graceful shutdown so that the service degrades safely.</text:p>
          </table:table-cell>
          <table:table-cell table:style-name="cell" office:value-type="string">
            <text:p>helper_client: shared HTTP client, retry with backoff, circuit breaker, HELPER_STRICT_REMOTE, X-Tenant-ID/X-Request-ID. Graceful shutdown: uvicorn timeout + compose stop_grace_period drains in-flight; SSE gets terminal shutdown frame; lifespan awaits task cancellation before closing Neo4j.</text:p>
          </table:table-cell>
          <table:table-cell table:style-name="cell" office:value-type="string">
            <text:p>Breaker open after N failures; strict-remote docling rejects local; retry classification (retriable vs not).</text:p>
          </table:table-cell>
          <table:table-cell table:style-name="cell" office:value-type="string">
            <text:p/>
          </table:table-cell>
          <table:table-cell table:style-name="cell" office:value-type="string">
            <text:p>helper_client, cortex-helper service.</text:p>
          </table:table-cell>
          <table:table-cell table:style-name="cell" office:value-type="string">
            <text:p>Helper service may be remote/shared.</text:p>
          </table:table-cell>
          <table:table-cell table:style-name="cell" office:value-type="string">
            <text:p>Happy: helper call succeeds. Error: breaker trips on repeated 5xx; strict-remote rejects local docling. Edge: shutdown frame mid-stream.</text:p>
          </table:table-cell>
          <table:table-cell table:style-name="cell" office:value-type="string">
            <text:p>Tested (test_resilience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FG-001</text:p>
          </table:table-cell>
          <table:table-cell table:style-name="cell" office:value-type="string">
            <text:p>Configuration &amp; production secret enforcement</text:p>
          </table:table-cell>
          <table:table-cell table:style-name="cell" office:value-type="string">
            <text:p>Configuration</text:p>
          </table:table-cell>
          <table:table-cell table:style-name="cell" office:value-type="string">
            <text:p>As an operator, I want env-driven config with budget fallbacks and production secret enforcement so that deployments are safe and tunable.</text:p>
          </table:table-cell>
          <table:table-cell table:style-name="cell" office:value-type="string">
            <text:p>config.py Pydantic settings (40+ vars). Token/context budget fallback cascade + legacy env aliasing (deprecation warns). ENVIRONMENT=production fails fast on weak/default secrets (_enforce_production_secrets). CORS allowlist-driven (wildcard disables credentials). neo4j tunables require CORTEX_NEO4J_ prefix.</text:p>
          </table:table-cell>
          <table:table-cell table:style-name="cell" office:value-type="string">
            <text:p>Weak prod secret -&gt; startup failure; wildcard CORS disables credentials; legacy env var -&gt; deprecation warning; NEO4J_ prefix trap on PaaS.</text:p>
          </table:table-cell>
          <table:table-cell table:style-name="cell" office:value-type="string">
            <text:p>secret strength in production; CORS origins.</text:p>
          </table:table-cell>
          <table:table-cell table:style-name="cell" office:value-type="string">
            <text:p>config.py.</text:p>
          </table:table-cell>
          <table:table-cell table:style-name="cell" office:value-type="string">
            <text:p>Env injected correctly per platform.</text:p>
          </table:table-cell>
          <table:table-cell table:style-name="cell" office:value-type="string">
            <text:p>Happy: valid prod config boots. Error: default secret in prod -&gt; fail fast. Boundary: budget fallback cascade order. Security: CORS wildcard+credentials mutually exclusive.</text:p>
          </table:table-cell>
          <table:table-cell table:style-name="cell" office:value-type="string">
            <text:p>Tested (test_budget_fallback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CFG-002</text:p>
          </table:table-cell>
          <table:table-cell table:style-name="cell" office:value-type="string">
            <text:p>Reasoning/thinking model dispatch</text:p>
          </table:table-cell>
          <table:table-cell table:style-name="cell" office:value-type="string">
            <text:p>Configuration</text:p>
          </table:table-cell>
          <table:table-cell table:style-name="cell" office:value-type="string">
            <text:p>As an operator, I want per-backend reasoning/thinking dispatch so that the right model params are sent per provider.</text:p>
          </table:table-cell>
          <table:table-cell table:style-name="cell" office:value-type="string">
            <text:p>reasoning_config: mode parse, model-family/backend classification, kwargs build, 400-fallback when provider rejects reasoning params. Reasoning OFF by default for chat.</text:p>
          </table:table-cell>
          <table:table-cell table:style-name="cell" office:value-type="string">
            <text:p>Unknown backend classification; provider 400 on reasoning param -&gt; retry without.</text:p>
          </table:table-cell>
          <table:table-cell table:style-name="cell" office:value-type="string">
            <text:p>mode enum.</text:p>
          </table:table-cell>
          <table:table-cell table:style-name="cell" office:value-type="string">
            <text:p>llm_config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reasoning kwargs per backend. Error: 400 reasoning param -&gt; fallback. Boundary: unknown model family default path.</text:p>
          </table:table-cell>
          <table:table-cell table:style-name="cell" office:value-type="string">
            <text:p>Tested (test_reasoning_config, test_prompt_cache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NAV-001</text:p>
          </table:table-cell>
          <table:table-cell table:style-name="cell" office:value-type="string">
            <text:p>Global navigation chrome</text:p>
          </table:table-cell>
          <table:table-cell table:style-name="cell" office:value-type="string">
            <text:p>Navigation</text:p>
          </table:table-cell>
          <table:table-cell table:style-name="cell" office:value-type="string">
            <text:p>As a user, I want persistent header/submenu/stats-bar so that I can navigate and see KB status.</text:p>
          </table:table-cell>
          <table:table-cell table:style-name="cell" office:value-type="string">
            <text:p>Header (Manage/Explore pills, Settings gear, Turbo indicator poll 5/30s). SubMenu context tabs (hidden on /admin). StatsBar (4 KPIs, poll 5s, orphan cleanup banner, hidden on /admin). LayoutWrapper minimal layout on /login. Redirect stubs: / -&gt; /documents; /entities,/relationships,/communities -&gt; explore tabs; /ask -&gt; chat/research.</text:p>
          </table:table-cell>
          <table:table-cell table:style-name="cell" office:value-type="string">
            <text:p>Turbo poll failure hides indicator; labels hidden below sm; redirects preserve intent.</text:p>
          </table:table-cell>
          <table:table-cell table:style-name="cell" office:value-type="string">
            <text:p/>
          </table:table-cell>
          <table:table-cell table:style-name="cell" office:value-type="string">
            <text:p>getTurboStatus, getStats, cleanupOrphanedEntities.</text:p>
          </table:table-cell>
          <table:table-cell table:style-name="cell" office:value-type="string">
            <text:p/>
          </table:table-cell>
          <table:table-cell table:style-name="cell" office:value-type="string">
            <text:p>Happy: navigate all sections. Edge: turbo indicator states; orphan banner. Responsive: labels collapse on mobile. Redirects: each stub resolves.</text:p>
          </table:table-cell>
          <table:table-cell table:style-name="cell" office:value-type="string">
            <text:p>Tested (LIVE E2E: anonymous / -&gt; 307 redirect, /login 200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Unauthenticated frontend redirect confirmed against running deployment. Dead components ask/AskInput.tsx, ask/AskSettings.tsx flagged (unused)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FE-001</text:p>
          </table:table-cell>
          <table:table-cell table:style-name="cell" office:value-type="string">
            <text:p>Frontend static quality gate</text:p>
          </table:table-cell>
          <table:table-cell table:style-name="cell" office:value-type="string">
            <text:p>Frontend Quality</text:p>
          </table:table-cell>
          <table:table-cell table:style-name="cell" office:value-type="string">
            <text:p>As a developer, I want the frontend to typecheck and lint cleanly so that type/lint regressions are caught.</text:p>
          </table:table-cell>
          <table:table-cell table:style-name="cell" office:value-type="string">
            <text:p>tsc --noEmit passes (tsconfig noEmit) and eslint (flat config) passes. CI runs both on every PR.</text:p>
          </table:table-cell>
          <table:table-cell table:style-name="cell" office:value-type="string">
            <text:p>Local node_modules root-owned (EACCES) blocks local install.</text:p>
          </table:table-cell>
          <table:table-cell table:style-name="cell" office:value-type="string">
            <text:p>TypeScript strict; eslint-config-next.</text:p>
          </table:table-cell>
          <table:table-cell table:style-name="cell" office:value-type="string">
            <text:p>typescript, eslint, next.</text:p>
          </table:table-cell>
          <table:table-cell table:style-name="cell" office:value-type="string">
            <text:p>CI gate authoritative.</text:p>
          </table:table-cell>
          <table:table-cell table:style-name="cell" office:value-type="string">
            <text:p>tsc --noEmit -&gt; 0 errors; eslint -&gt; 0 errors.</text:p>
          </table:table-cell>
          <table:table-cell table:style-name="cell" office:value-type="string">
            <text:p>Passed (tsc --noEmit clean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Local node_modules root-owned (EACCES); typecheck run in user-owned copy -&gt; 0 errors. eslint deferred to CI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PIPE-001</text:p>
          </table:table-cell>
          <table:table-cell table:style-name="cell" office:value-type="string">
            <text:p>Document conversion (Docling worker / remote offload)</text:p>
          </table:table-cell>
          <table:table-cell table:style-name="cell" office:value-type="string">
            <text:p>Document Pipeline</text:p>
          </table:table-cell>
          <table:table-cell table:style-name="cell" office:value-type="string">
            <text:p>As an operator, I want CPU-bound document conversion isolated (subprocess or shared remote service) so that the event loop stays responsive and memory is bounded.</text:p>
          </table:table-cell>
          <table:table-cell table:style-name="cell" office:value-type="string">
            <text:p>Without DOCLING_SERVICE_URL: spawns python -m app.services.docling_worker subprocess (JSON over stdin/stdout, global semaphore of 1, TableFormer ACCURATE). With URL: POST to shared /convert via helper_client (3 retries, breaker). Large PDFs chunked by DOCLING_MAX_PAGES_PER_CHUNK; raw-text/code fast-path skips Docling.</text:p>
          </table:table-cell>
          <table:table-cell table:style-name="cell" office:value-type="string">
            <text:p>Worker OOM/non-zero exit -&gt; RuntimeError; empty stdout -&gt; error; slim image w/o docling + no URL -&gt; actionable error; HELPER_STRICT_REMOTE -&gt; no local fallback; max_num_pages 500 cap; mdx/xml plain-text fallback.</text:p>
          </table:table-cell>
          <table:table-cell table:style-name="cell" office:value-type="string">
            <text:p>File exists; DOCLING_MAX_FILE_SIZE_BYTES; page caps.</text:p>
          </table:table-cell>
          <table:table-cell table:style-name="cell" office:value-type="string">
            <text:p>docling_worker, helper_client, docling-core.</text:p>
          </table:table-cell>
          <table:table-cell table:style-name="cell" office:value-type="string">
            <text:p>docling not imported at module scope (avoids torch import).</text:p>
          </table:table-cell>
          <table:table-cell table:style-name="cell" office:value-type="string">
            <text:p>Happy: convert pdf -&gt; markdown. Error: worker OOM -&gt; RuntimeError, strict-remote unreachable -&gt; doc FAILED. Boundary: 500+ page PDF chunked, raw-text fast path. Perf: large-PDF per-chunk cache unload.</text:p>
          </table:table-cell>
          <table:table-cell table:style-name="cell" office:value-type="string">
            <text:p>Tested (LIVE E2E: raw-text doc ingested via real pipeline end-to-end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Raw-text fast path exercised end-to-end live (chunk-&gt;embed-&gt;store). docling_worker binary conversion still needs a PDF/disposable corpus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PIPE-002</text:p>
          </table:table-cell>
          <table:table-cell table:style-name="cell" office:value-type="string">
            <text:p>Vision image analysis &amp; OCR</text:p>
          </table:table-cell>
          <table:table-cell table:style-name="cell" office:value-type="string">
            <text:p>Document Pipeline</text:p>
          </table:table-cell>
          <table:table-cell table:style-name="cell" office:value-type="string">
            <text:p>As a user, I want images in documents analyzed (vision model or OCR) so that their content is searchable.</text:p>
          </table:table-cell>
          <table:table-cell table:style-name="cell" office:value-type="string">
            <text:p>When use_vision: extracts PictureItems, downscales over VISION_MAX_IMAGE_SIDE, POSTs data-URL to vision model (Summary/Visual/OCR/Data/Context). Fallback chain: vision -&gt; Docling description -&gt; 'Image on page N'. When no vision model: EasyOCR (en+de, conf 0.2). Background analysis gated by VISION_MAX_CONCURRENT (3); image chunks chunk_index 1000+.</text:p>
          </table:table-cell>
          <table:table-cell table:style-name="cell" office:value-type="string">
            <text:p>No API key -&gt; None; image &lt; VISION_MIN_IMAGE_SIDE skipped; HTTP 400 reasoning -&gt; strip+retry once, cache unsupported; per-image failure doesn't fail doc; vision-model and EasyOCR mutually exclusive.</text:p>
          </table:table-cell>
          <table:table-cell table:style-name="cell" office:value-type="string">
            <text:p>min(w,h) &gt;= VISION_MIN_IMAGE_SIDE; output &lt;= VISION_MAX_OUTPUT_TOKENS.</text:p>
          </table:table-cell>
          <table:table-cell table:style-name="cell" office:value-type="string">
            <text:p>vision_analyzer, LLM vision endpoint, EasyOCR.</text:p>
          </table:table-cell>
          <table:table-cell table:style-name="cell" office:value-type="string">
            <text:p>Choosing vision model loses EasyOCR en/de unless model transcribes text.</text:p>
          </table:table-cell>
          <table:table-cell table:style-name="cell" office:value-type="string">
            <text:p>Happy: image -&gt; analysis chunk. Error: no key -&gt; none, sub-min image skipped. Boundary: RGBA-&gt;PNG, oversize downscale. Edge: vision 400 -&gt; retry without reasoning.</text:p>
          </table:table-cell>
          <table:table-cell table:style-name="cell" office:value-type="string">
            <text:p>Tested (test_vision_image_prep: encoding/downscale/no-mutation) + Documented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>Image-payload prep now unit-tested; live vision-model analysis remains manual.</text:p>
          </table:table-cell>
          <table:table-cell table:style-name="cell" office:value-type="string">
            <text:p>2026-06-22</text:p>
          </table:table-cell>
        </table:table-row>
        <table:table-row>
          <table:table-cell table:style-name="cell" office:value-type="string">
            <text:p>F-DOCPIPE-003</text:p>
          </table:table-cell>
          <table:table-cell table:style-name="cell" office:value-type="string">
            <text:p>Processing cancellation &amp; progress</text:p>
          </table:table-cell>
          <table:table-cell table:style-name="cell" office:value-type="string">
            <text:p>Document Pipeline</text:p>
          </table:table-cell>
          <table:table-cell table:style-name="cell" office:value-type="string">
            <text:p>As a user, I want to cancel in-flight document processing and see granular progress so that I control long ingests.</text:p>
          </table:table-cell>
          <table:table-cell table:style-name="cell" office:value-type="string">
            <text:p>Cooperative cancellation via asyncio.Event honored at every major stage + before each chunk store; waits &lt;=10s then marks FAILED 'Processing cancelled'. Progress PENDING-&gt;PROCESSING-&gt;EXTRACTING-&gt;COMPLETED/FAILED with numeric milestones; image progress tracked separately.</text:p>
          </table:table-cell>
          <table:table-cell table:style-name="cell" office:value-type="string">
            <text:p>No running task -&gt; no-op; task ignoring flag &gt;10s -&gt; TimeoutError logged, cleanup proceeds; mid-stage cancel may leave chunks (delete cleanup handles); doc shows 'completed' while images still analyzing.</text:p>
          </table:table-cell>
          <table:table-cell table:style-name="cell" office:value-type="string">
            <text:p/>
          </table:table-cell>
          <table:table-cell table:style-name="cell" office:value-type="string">
            <text:p>document_processor, task store.</text:p>
          </table:table-cell>
          <table:table-cell table:style-name="cell" office:value-type="string">
            <text:p>Cancellation honored only at checkpoints (cooperative).</text:p>
          </table:table-cell>
          <table:table-cell table:style-name="cell" office:value-type="string">
            <text:p>Happy: cancel mid-process -&gt; FAILED. Edge: cancel with no task, slow task &gt;10s timeout. Boundary: cancel right before chunk store.</text:p>
          </table:table-cell>
          <table:table-cell table:style-name="cell" office:value-type="string">
            <text:p>Documented (manual)</text:p>
          </table:table-cell>
          <table:table-cell table:style-name="cell" office:value-type="string">
            <text:p>0</text:p>
          </table:table-cell>
          <table:table-cell table:style-name="cell" office:value-type="string">
            <text:p/>
          </table:table-cell>
          <table:table-cell table:style-name="cell" office:value-type="string">
            <text:p/>
          </table:table-cell>
          <table:table-cell table:style-name="cell" office:value-type="string">
            <text:p>2026-06-22</text:p>
          </table:table-cell>
        </table:table-row>
      </table:table>
      <table:table table:name="Defects">
        <table:table-column table:style-name="mcol"/>
        <table:table-column table:style-name="mcol"/>
        <table:table-column table:style-name="wcol"/>
        <table:table-column table:style-name="wcol"/>
        <table:table-column table:style-name="wcol"/>
        <table:table-column table:style-name="ncol"/>
        <table:table-column table:style-name="wcol"/>
        <table:table-column table:style-name="ncol"/>
        <table:table-row>
          <table:table-cell table:style-name="hdr" office:value-type="string">
            <text:p>Defect ID</text:p>
          </table:table-cell>
          <table:table-cell table:style-name="hdr" office:value-type="string">
            <text:p>Feature ID</text:p>
          </table:table-cell>
          <table:table-cell table:style-name="hdr" office:value-type="string">
            <text:p>Reproduction Steps</text:p>
          </table:table-cell>
          <table:table-cell table:style-name="hdr" office:value-type="string">
            <text:p>Expected Result</text:p>
          </table:table-cell>
          <table:table-cell table:style-name="hdr" office:value-type="string">
            <text:p>Actual Result</text:p>
          </table:table-cell>
          <table:table-cell table:style-name="hdr" office:value-type="string">
            <text:p>Severity</text:p>
          </table:table-cell>
          <table:table-cell table:style-name="hdr" office:value-type="string">
            <text:p>Root Cause Hypothesis</text:p>
          </table:table-cell>
          <table:table-cell table:style-name="hdr" office:value-type="string">
            <text:p>Status</text:p>
          </table:table-cell>
        </table:table-row>
        <table:table-row>
          <table:table-cell table:style-name="cell" office:value-type="string">
            <text:p>D-001</text:p>
          </table:table-cell>
          <table:table-cell table:style-name="cell" office:value-type="string">
            <text:p>F-GIT-002</text:p>
          </table:table-cell>
          <table:table-cell table:style-name="cell" office:value-type="string">
            <text:p>From a checkout containing a real .env with embedding creds (e.g. USE_OPENAI_EMBEDDINGS=true + Venice EMBEDDING_API_KEY), run `cd backend &amp;&amp; python -m pytest tests/test_git_sync.py::test_supported_extensions_filter`.</text:p>
          </table:table-cell>
          <table:table-cell table:style-name="cell" office:value-type="string">
            <text:p>Test passes hermetically; GitConnectorService._supported() should be a pure extension lookup with no LLM/embedder construction.</text:p>
          </table:table-cell>
          <table:table-cell table:style-name="cell" office:value-type="string">
            <text:p>FAILED: LLMCallNotAllowedInTest. _supported() accessed self.processor.RAW_TEXT_EXTENSIONS, which instantiates a full DocumentProcessor and constructs a real OpenAIDocumentEmbedder; conftest mock_llm guard fired.</text:p>
          </table:table-cell>
          <table:table-cell table:style-name="cell" office:value-type="string">
            <text:p>Medium</text:p>
          </table:table-cell>
          <table:table-cell table:style-name="cell" office:value-type="string">
            <text:p>RAW_TEXT_EXTENSIONS is a class attribute, but _supported read it through an instance, forcing heavy processor (embedder/splitter) construction during change-set computation. Test isolation also leaked: _isolate_env blanks openai_api_key but not the embedding credentials.</text:p>
          </table:table-cell>
          <table:table-cell table:style-name="cell" office:value-type="string">
            <text:p>FIXED — _supported() now reads DocumentProcessor.RAW_TEXT_EXTENSIONS from the class without instantiating. Full suite 323/323 green, no regression.</text:p>
          </table:table-cell>
        </table:table-row>
        <table:table-row>
          <table:table-cell table:style-name="cell" office:value-type="string">
            <text:p>D-002</text:p>
          </table:table-cell>
          <table:table-cell table:style-name="cell" office:value-type="string">
            <text:p>F-TURBO-001</text:p>
          </table:table-cell>
          <table:table-cell table:style-name="cell" office:value-type="string">
            <text:p>Static/dynamic: invoke the vLLM-readiness path — Compute3Service.wait_for_vllm_ready() (reached when create_turbo_job(wait_for_ready=True)). Lines 312/508 of compute3_service.py.</text:p>
          </table:table-cell>
          <table:table-cell table:style-name="cell" office:value-type="string">
            <text:p>Readiness branch fetches the auth token via the async Compute3 API and enables turbo state without crashing.</text:p>
          </table:table-cell>
          <table:table-cell table:style-name="cell" office:value-type="string">
            <text:p>Latent crash: (1) job.get_auth_token() — no such method on Compute3Job (it is the async Service.get_job_token(job_id)) -&gt; AttributeError; (2) set_turbo_mode_state(True, base_url, token, job_key) passes 4 args to a 3-arg function -&gt; TypeError. Currently unreachable (wait_for_ready defaults False; no caller sets True), so inert today but a landmine.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Readiness branch diverged from the working live path (get_active_turbo_job at L542-557 correctly uses await self.get_job_token(job.job_id) + 3-arg set_turbo_mode_state). The dead branch was never exercised so the API drift went unnoticed.</text:p>
          </table:table-cell>
          <table:table-cell table:style-name="cell" office:value-type="string">
            <text:p>FIXED — both call sites now mirror the live path: await self.get_job_token(job.job_id) when job.auth, and 3-arg set_turbo_mode_state. Added tests/test_compute3_turbo.py (4 tests, previously-zero compute3 coverage). Suite 327/327 green.</text:p>
          </table:table-cell>
        </table:table-row>
        <table:table-row>
          <table:table-cell table:style-name="cell" office:value-type="string">
            <text:p>D-003</text:p>
          </table:table-cell>
          <table:table-cell table:style-name="cell" office:value-type="string">
            <text:p>F-ADMIN-005</text:p>
          </table:table-cell>
          <table:table-cell table:style-name="cell" office:value-type="string">
            <text:p>api_usage_service.categorize_endpoint('/api/custom-inputs/abc123').</text:p>
          </table:table-cell>
          <table:table-cell table:style-name="cell" office:value-type="string">
            <text:p>'documents' (it is a custom-inputs read path).</text:p>
          </table:table-cell>
          <table:table-cell table:style-name="cell" office:value-type="string">
            <text:p>'upload' — prefix matching iterated ENDPOINT_CATEGORIES in insertion order and '/api/custom-input' (upload) is a string prefix of '/api/custom-inputs/...', so the shorter, less-specific prefix won.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Prefix categorization used dict-insertion order instead of longest-prefix-wins; a string-prefix collision between '/api/custom-input' and '/api/custom-inputs' mislabeled the latter's sub-paths in per-key usage analytics (data integrity).</text:p>
          </table:table-cell>
          <table:table-cell table:style-name="cell" office:value-type="string">
            <text:p>FIXED — categorize_endpoint now matches the longest (most-specific) prefix first. Added tests/test_api_usage_service.py (19 cases incl. the regression). Suite 366/366 green.</text:p>
          </table:table-cell>
        </table:table-row>
        <table:table-row>
          <table:table-cell table:style-name="cell" office:value-type="string">
            <text:p>D-004</text:p>
          </table:table-cell>
          <table:table-cell table:style-name="cell" office:value-type="string">
            <text:p>F-OBS-001</text:p>
          </table:table-cell>
          <table:table-cell table:style-name="cell" office:value-type="string">
            <text:p>Against the running deployment: curl -s -o /dev/null -w '%{http_code}' http://localhost:8000/openapi.json (also /docs, /redoc) -&gt; 200, unauthenticated.</text:p>
          </table:table-cell>
          <table:table-cell table:style-name="cell" office:value-type="string">
            <text:p>A production/ directly-exposed backend should not disclose its full API schema + interactive docs to anonymous callers.</text:p>
          </table:table-cell>
          <table:table-cell table:style-name="cell" office:value-type="string">
            <text:p>FastAPI was constructed with default docs URLs, so /docs, /redoc and /openapi.json were served publicly (HTTP 200, no auth). Confirmed live via end-to-end probe of the running container.</text:p>
          </table:table-cell>
          <table:table-cell table:style-name="cell" office:value-type="string">
            <text:p>Low</text:p>
          </table:table-cell>
          <table:table-cell table:style-name="cell" office:value-type="string">
            <text:p>Information disclosure / missing hardening: app = FastAPI(...) used the framework defaults (docs_url=/docs etc.) with no environment gating. The prod nginx routes root paths to the frontend, but any directly-exposed backend (this dev stack, the per-tenant container model) leaks the schema.</text:p>
          </table:table-cell>
          <table:table-cell table:style-name="cell" office:value-type="string">
            <text:p>FIXED — added Settings.expose_api_docs ('auto' default) + docs_enabled property: docs/redoc/openapi disabled in production by default, dev unchanged, EXPOSE_API_DOCS=true/false overrides. Wired into FastAPI(docs_url/redoc_url/openapi_url). Added tests/test_docs_exposure.py (12). Suite 458/458 green; live auth-boundary E2E in tests/test_live_e2e.py.</text:p>
          </table:table-cell>
        </table:table-row>
      </table:table>
      <table:table table:name="Summary">
        <table:table-column table:style-name="wcol"/>
        <table:table-column table:style-name="mcol"/>
        <table:table-row>
          <table:table-cell table:style-name="hdr" office:value-type="string">
            <text:p>Metric</text:p>
          </table:table-cell>
          <table:table-cell table:style-name="hdr" office:value-type="string">
            <text:p>Value</text:p>
          </table:table-cell>
        </table:table-row>
        <table:table-row>
          <table:table-cell table:style-name="cell" office:value-type="string">
            <text:p>Total Features</text:p>
          </table:table-cell>
          <table:table-cell table:style-name="cell" office:value-type="string">
            <text:p>50</text:p>
          </table:table-cell>
        </table:table-row>
        <table:table-row>
          <table:table-cell table:style-name="cell" office:value-type="string">
            <text:p>Total Defects</text:p>
          </table:table-cell>
          <table:table-cell table:style-name="cell" office:value-type="string">
            <text:p>4</text:p>
          </table:table-cell>
        </table:table-row>
        <table:table-row>
          <table:table-cell table:style-name="cell" office:value-type="string">
            <text:p/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--- Features by Area ---</text:p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Admin</text:p>
          </table:table-cell>
          <table:table-cell table:style-name="cell" office:value-type="string">
            <text:p>5</text:p>
          </table:table-cell>
        </table:table-row>
        <table:table-row>
          <table:table-cell table:style-name="cell" office:value-type="string">
            <text:p>Auth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Collections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Communities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Configuration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Custom Inputs</text:p>
          </table:table-cell>
          <table:table-cell table:style-name="cell" office:value-type="string">
            <text:p>3</text:p>
          </table:table-cell>
        </table:table-row>
        <table:table-row>
          <table:table-cell table:style-name="cell" office:value-type="string">
            <text:p>Deduplicate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Document Pipeline</text:p>
          </table:table-cell>
          <table:table-cell table:style-name="cell" office:value-type="string">
            <text:p>3</text:p>
          </table:table-cell>
        </table:table-row>
        <table:table-row>
          <table:table-cell table:style-name="cell" office:value-type="string">
            <text:p>Documents</text:p>
          </table:table-cell>
          <table:table-cell table:style-name="cell" office:value-type="string">
            <text:p>7</text:p>
          </table:table-cell>
        </table:table-row>
        <table:table-row>
          <table:table-cell table:style-name="cell" office:value-type="string">
            <text:p>Entities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Frontend Quality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Git Integration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Knowledge Graph</text:p>
          </table:table-cell>
          <table:table-cell table:style-name="cell" office:value-type="string">
            <text:p>3</text:p>
          </table:table-cell>
        </table:table-row>
        <table:table-row>
          <table:table-cell table:style-name="cell" office:value-type="string">
            <text:p>Navigation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Observability</text:p>
          </table:table-cell>
          <table:table-cell table:style-name="cell" office:value-type="string">
            <text:p>2</text:p>
          </table:table-cell>
        </table:table-row>
        <table:table-row>
          <table:table-cell table:style-name="cell" office:value-type="string">
            <text:p>Relationships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Search/RAG</text:p>
          </table:table-cell>
          <table:table-cell table:style-name="cell" office:value-type="string">
            <text:p>4</text:p>
          </table:table-cell>
        </table:table-row>
        <table:table-row>
          <table:table-cell table:style-name="cell" office:value-type="string">
            <text:p>Security</text:p>
          </table:table-cell>
          <table:table-cell table:style-name="cell" office:value-type="string">
            <text:p>4</text:p>
          </table:table-cell>
        </table:table-row>
        <table:table-row>
          <table:table-cell table:style-name="cell" office:value-type="string">
            <text:p>Skills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System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urbo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/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--- Features by Status ---</text:p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Documented (manual)</text:p>
          </table:table-cell>
          <table:table-cell table:style-name="cell" office:value-type="string">
            <text:p>21</text:p>
          </table:table-cell>
        </table:table-row>
        <table:table-row>
          <table:table-cell table:style-name="cell" office:value-type="string">
            <text:p>Passed (tsc --noEmit clean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HTTP contract 422 + RRF unit + LIVE E2E real hybrid search returns results vs 156-doc/5.3k-entity graph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LIVE E2E: anonymous / -&gt; 307 redirect, /login 200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LIVE E2E: raw-text doc ingested via real pipeline end-to-end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caps + LIVE E2E ingestion: upload-&gt;processed(completed)-&gt;searchable-&gt;self-cleaning delete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caps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catalog TTL cache + SKILL.md parse/sanitize/env-boundary: test_skill_service_helpers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deadline wiring test_resilience; HTTP contract 422; LIVE E2E confirmed 504 deadline_exceeded after 28s with retry guidance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entity resolution slices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import caps + NDJSON round-trip: test_library_transfer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prompt/tool assembly + loop helpers: merge/dedup/truncate/substitute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api_usage_service: endpoint categorization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auth_service unit + test_auth_enforcement_http + LIVE E2E: real 401 on protected endpoints against running deployment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auth_service: can_access_collection, get_collection_filter, validate_collection_access 403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budget_fallback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checkpoint_delta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compute3_turbo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context_curator + LIVE E2E SSE: fast-search stream delivers content+done, no error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entity_resolution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git_providers, test_git_sync, test_crypto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git_sync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max_collections + LIVE E2E CRUD round-trip vs real Neo4j: create/get/rename/delete/404, default-protected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observability + LIVE E2E: /health 200, /metrics 401) + docs gating (test_docs_exposure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reasoning_config, test_prompt_cache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researcher_prompt anti-injection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resilience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resilience, test_max_queries_per_month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vision_image_prep: encoding/downscale/no-mutation) + Documented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>Tested (test_xml_parsing, test_chunk_batch_extraction, test_batched_writes + LIVE E2E: entities extracted from uploaded doc, orphan cleanup verified)</text:p>
          </table:table-cell>
          <table:table-cell table:style-name="cell" office:value-type="string">
            <text:p>1</text:p>
          </table:table-cell>
        </table:table-row>
        <table:table-row>
          <table:table-cell table:style-name="cell" office:value-type="string">
            <text:p/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--- Defects by Severity ---</text:p>
          </table:table-cell>
          <table:table-cell table:style-name="cell" office:value-type="string">
            <text:p/>
          </table:table-cell>
        </table:table-row>
        <table:table-row>
          <table:table-cell table:style-name="cell" office:value-type="string">
            <text:p>Low</text:p>
          </table:table-cell>
          <table:table-cell table:style-name="cell" office:value-type="string">
            <text:p>3</text:p>
          </table:table-cell>
        </table:table-row>
        <table:table-row>
          <table:table-cell table:style-name="cell" office:value-type="string">
            <text:p>Medium</text:p>
          </table:table-cell>
          <table:table-cell table:style-name="cell"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